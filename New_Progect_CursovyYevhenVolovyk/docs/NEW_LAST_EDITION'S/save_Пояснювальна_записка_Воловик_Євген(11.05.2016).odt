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F7000004020615F5E4.png"/>
  <manifest:file-entry manifest:media-type="image/png" manifest:full-path="Pictures/100002010000065C00000820E6C51BD8.png"/>
  <manifest:file-entry manifest:media-type="image/png" manifest:full-path="Pictures/10000201000002A70000031511816307.png"/>
  <manifest:file-entry manifest:media-type="image/png" manifest:full-path="Pictures/10000201000006F4000009E76A4F3523.png"/>
  <manifest:file-entry manifest:media-type="image/png" manifest:full-path="Pictures/10000201000001CD000002EFFBF4E120.png"/>
  <manifest:file-entry manifest:media-type="image/png" manifest:full-path="Pictures/10000201000005CD0000078FC0EE237B.png"/>
  <manifest:file-entry manifest:media-type="image/png" manifest:full-path="Pictures/10000000000007EF0000053004AA250D.png"/>
  <manifest:file-entry manifest:media-type="image/png" manifest:full-path="Pictures/100002010000065E00000820D3C06C6A.png"/>
  <manifest:file-entry manifest:media-type="image/png" manifest:full-path="Pictures/10000000000007EF000005309D55F38F.png"/>
  <manifest:file-entry manifest:media-type="image/png" manifest:full-path="Pictures/100002010000078A0000049C27745E83.png"/>
  <manifest:file-entry manifest:media-type="image/png" manifest:full-path="Pictures/100002010000078A000004E70847261B.png"/>
  <manifest:file-entry manifest:media-type="image/jpeg" manifest:full-path="Pictures/100000000000078000000585CE949DAA.jpg"/>
  <manifest:file-entry manifest:media-type="image/png" manifest:full-path="Pictures/10000000000007EF0000053088356E81.png"/>
  <manifest:file-entry manifest:media-type="image/png" manifest:full-path="Pictures/10000000000007EF000005301EF640F9.png"/>
  <manifest:file-entry manifest:media-type="image/png" manifest:full-path="Pictures/10000000000007EF00000530A4C519A1.png"/>
  <manifest:file-entry manifest:media-type="image/png" manifest:full-path="Pictures/100002010000037000000370CD450F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27cm" fo:margin-left="0.076cm" fo:margin-right="0.099cm" fo:margin-top="0cm" fo:margin-bottom="0cm" table:align="margins" style:writing-mode="lr-tb"/>
    </style:style>
    <style:style style:name="Table1.A" style:family="table-column">
      <style:table-column-properties style:column-width="3.034cm" style:rel-column-width="1720*"/>
    </style:style>
    <style:style style:name="Table1.B" style:family="table-column">
      <style:table-column-properties style:column-width="3.313cm" style:rel-column-width="1878*"/>
    </style:style>
    <style:style style:name="Table1.C" style:family="table-column">
      <style:table-column-properties style:column-width="3.29cm" style:rel-column-width="1865*"/>
    </style:style>
    <style:style style:name="Table1.E" style:family="table-column">
      <style:table-column-properties style:column-width="3.378cm" style:rel-column-width="1915*"/>
    </style:style>
    <style:style style:name="Table1.1" style:family="table-row">
      <style:table-row-properties style:min-row-height="0.667cm" style:keep-together="true" fo:keep-together="auto"/>
    </style:style>
    <style:style style:name="Table1.A1" style:family="table-cell">
      <style:table-cell-properties fo:background-color="#579d1c" fo:padding-left="0.191cm" fo:padding-right="0.191cm" fo:padding-top="0cm" fo:padding-bottom="0cm" fo:border="0.018cm solid #00000a">
        <style:background-image/>
      </style:table-cell-properties>
    </style:style>
    <style:style style:name="Table1.2" style:family="table-row">
      <style:table-row-properties style:keep-together="true" fo:keep-together="auto"/>
    </style:style>
    <style:style style:name="Table1.A2"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50%" fo:text-align="center" style:justify-single-word="false"/>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fo:text-align="start" style:justify-single-word="false"/>
    </style:style>
    <style:style style:name="P5" style:family="paragraph" style:parent-style-name="Standard">
      <style:paragraph-properties fo:margin-top="0cm" fo:margin-bottom="0cm" fo:line-height="150%" fo:text-align="end" style:justify-single-word="false"/>
      <style:text-properties fo:font-size="10pt" style:font-size-asian="10pt" style:font-size-complex="10pt"/>
    </style:style>
    <style:style style:name="P6" style:family="paragraph" style:parent-style-name="Standard">
      <style:paragraph-properties fo:margin-top="0cm" fo:margin-bottom="0cm" fo:line-height="150%" fo:text-align="center" style:justify-single-word="false"/>
      <style:text-properties fo:font-size="14pt" style:font-size-asian="14pt" style:font-size-complex="14pt"/>
    </style:style>
    <style:style style:name="P7" style:family="paragraph" style:parent-style-name="Standard">
      <style:paragraph-properties fo:margin-top="0cm" fo:margin-bottom="0cm" fo:line-height="100%"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master-page-name="Standard">
      <style:paragraph-properties fo:margin-top="0cm" fo:margin-bottom="0cm" fo:line-height="150%" fo:text-align="center" style:justify-single-word="false" style:page-number="auto"/>
    </style:style>
    <style:style style:name="P9" style:family="paragraph" style:parent-style-name="Standard">
      <style:paragraph-properties fo:margin-top="0cm" fo:margin-bottom="0.635cm" fo:line-height="150%" fo:text-align="center" style:justify-single-word="false"/>
    </style:style>
    <style:style style:name="P10" style:family="paragraph" style:parent-style-name="Standard">
      <style:paragraph-properties fo:margin-top="0cm" fo:margin-bottom="0.635cm" fo:line-height="150%" fo:text-align="center" style:justify-single-word="false"/>
      <style:text-properties fo:font-weight="normal" style:font-weight-asian="normal" style:font-weight-complex="normal"/>
    </style:style>
    <style:style style:name="P11" style:family="paragraph" style:parent-style-name="Standard">
      <style:paragraph-properties fo:margin-top="0cm" fo:margin-bottom="0.635cm" fo:line-height="150%" fo:text-align="end" style:justify-single-word="false"/>
      <style:text-properties fo:font-size="10pt" style:font-size-asian="10pt" style:font-size-complex="10pt"/>
    </style:style>
    <style:style style:name="P12" style:family="paragraph" style:parent-style-name="Standard">
      <style:paragraph-properties fo:margin-top="0cm" fo:margin-bottom="1.693cm" fo:line-height="150%" fo:text-align="end" style:justify-single-word="false"/>
      <style:text-properties fo:font-size="10pt" style:font-size-asian="10pt" style:font-size-complex="10pt"/>
    </style:style>
    <style:style style:name="P13" style:family="paragraph" style:parent-style-name="Standard">
      <style:paragraph-properties fo:margin-top="0cm" fo:margin-bottom="1.693cm" fo:line-height="150%" fo:text-align="center" style:justify-single-word="false"/>
      <style:text-properties fo:font-size="14pt" style:font-size-asian="14pt" style:font-size-complex="14pt"/>
    </style:style>
    <style:style style:name="P14" style:family="paragraph" style:parent-style-name="Standard">
      <style:paragraph-properties fo:margin-top="0cm" fo:margin-bottom="1.693cm" fo:line-height="100%" fo:text-align="center" style:justify-single-word="false"/>
      <style:text-properties fo:font-size="14pt" style:font-size-asian="14pt" style:font-size-complex="14pt"/>
    </style:style>
    <style:style style:name="P15" style:family="paragraph" style:parent-style-name="Standard">
      <style:paragraph-properties fo:margin-top="0cm" fo:margin-bottom="0.423cm" fo:line-height="150%" fo:text-align="center" style:justify-single-word="false"/>
    </style:style>
    <style:style style:name="P16" style:family="paragraph" style:parent-style-name="Standard">
      <style:paragraph-properties fo:margin-top="0cm" fo:margin-bottom="0.847cm" fo:line-height="150%" fo:text-align="end" style:justify-single-word="false"/>
      <style:text-properties fo:font-size="10pt" style:font-size-asian="10pt" style:font-size-complex="10pt"/>
    </style:style>
    <style:style style:name="P17" style:family="paragraph" style:parent-style-name="Standard">
      <style:paragraph-properties fo:margin-top="0cm" fo:margin-bottom="1.27cm" fo:line-height="150%" fo:text-align="center" style:justify-single-word="false"/>
      <style:text-properties fo:font-weight="normal" style:font-weight-asian="normal" style:font-weight-complex="normal"/>
    </style:style>
    <style:style style:name="P18" style:family="paragraph" style:parent-style-name="Standard">
      <style:paragraph-properties fo:margin-top="0cm" fo:margin-bottom="0.071cm" fo:line-height="150%" fo:text-align="start" style:justify-single-word="false"/>
    </style:style>
    <style:style style:name="P19" style:family="paragraph" style:parent-style-name="Standard">
      <style:paragraph-properties fo:margin-top="0cm" fo:margin-bottom="0.071cm" fo:line-height="150%" fo:text-align="center" style:justify-single-word="false"/>
      <style:text-properties fo:font-weight="normal" style:font-weight-asian="normal" style:font-weight-complex="normal"/>
    </style:style>
    <style:style style:name="P20"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21" style:family="paragraph" style:parent-style-name="Standard">
      <style:paragraph-properties fo:margin-left="0cm" fo:margin-right="0cm" fo:margin-top="0cm" fo:margin-bottom="0cm" fo:line-height="150%" fo:text-align="center" style:justify-single-word="false" fo:text-indent="1.251cm" style:auto-text-indent="false"/>
    </style:style>
    <style:style style:name="P22" style:family="paragraph" style:parent-style-name="Standard">
      <style:paragraph-properties fo:margin-left="0cm" fo:margin-right="0cm" fo:margin-top="0cm" fo:margin-bottom="0cm" fo:line-height="150%" fo:text-align="center" style:justify-single-word="false" fo:text-indent="1.251cm" style:auto-text-indent="false"/>
      <style:text-properties fo:font-weight="normal" style:font-weight-asian="normal" style:font-weight-complex="normal"/>
    </style:style>
    <style:style style:name="P23" style:family="paragraph" style:parent-style-name="Standard">
      <style:paragraph-properties fo:margin-left="0cm" fo:margin-right="0cm" fo:margin-top="0.423cm" fo:margin-bottom="0.212cm" fo:line-height="150%" fo:text-align="start" style:justify-single-word="false" fo:text-indent="1.251cm" style:auto-text-indent="false"/>
      <style:text-properties fo:font-weight="normal" style:font-weight-asian="normal" style:font-weight-complex="normal"/>
    </style:style>
    <style:style style:name="P24" style:family="paragraph" style:parent-style-name="Standard">
      <style:paragraph-properties fo:margin-left="0cm" fo:margin-right="0cm" fo:margin-top="0cm" fo:margin-bottom="0.423cm" fo:line-height="150%" fo:text-align="justify" style:justify-single-word="false" fo:text-indent="1.251cm" style:auto-text-indent="false"/>
    </style:style>
    <style:style style:name="P25" style:family="paragraph" style:parent-style-name="Standard">
      <style:paragraph-properties fo:margin-top="0.212cm" fo:margin-bottom="0.212cm" fo:line-height="150%" fo:text-align="center" style:justify-single-word="false"/>
    </style:style>
    <style:style style:name="P26" style:family="paragraph" style:parent-style-name="Standard">
      <style:paragraph-properties fo:margin-top="0.212cm" fo:margin-bottom="0.212cm" fo:line-height="150%" fo:text-align="center" style:justify-single-word="false">
        <style:tab-stops>
          <style:tab-stop style:position="16.499cm" style:type="right"/>
        </style:tab-stops>
      </style:paragraph-properties>
    </style:style>
    <style:style style:name="P27" style:family="paragraph" style:parent-style-name="Standard">
      <style:paragraph-properties fo:margin-top="0.212cm" fo:margin-bottom="0.212cm" fo:line-height="150%" fo:text-align="center" style:justify-single-word="false"/>
      <style:text-properties fo:font-weight="normal" style:font-weight-asian="normal" style:font-weight-complex="normal"/>
    </style:style>
    <style:style style:name="P28" style:family="paragraph" style:parent-style-name="Standard">
      <style:paragraph-properties fo:margin-top="0.212cm" fo:margin-bottom="0cm" fo:line-height="100%" fo:text-align="center" style:justify-single-word="false"/>
    </style:style>
    <style:style style:name="P29" style:family="paragraph" style:parent-style-name="Standard">
      <style:paragraph-properties fo:margin-left="1.251cm" fo:margin-right="0cm" fo:margin-top="0cm" fo:margin-bottom="0cm" fo:line-height="150%" fo:text-align="justify" style:justify-single-word="false" fo:text-indent="0cm" style:auto-text-indent="false"/>
    </style:style>
    <style:style style:name="P30" style:family="paragraph" style:parent-style-name="Standard">
      <style:paragraph-properties fo:margin-left="0.801cm" fo:margin-right="0cm" fo:margin-top="0cm" fo:margin-bottom="0.212cm" fo:line-height="150%" fo:text-align="justify" style:justify-single-word="false" fo:text-indent="-0.801cm" style:auto-text-indent="false"/>
    </style:style>
    <style:style style:name="P31"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fo:font-style="normal" style:font-size-asian="14pt" style:font-style-asian="normal"/>
    </style:style>
    <style:style style:name="T4" style:family="text">
      <style:text-properties style:font-name="Times New Roman" fo:font-size="14pt" fo:font-style="normal" style:font-size-asian="14pt" style:font-style-asian="normal" style:font-size-complex="14pt"/>
    </style:style>
    <style:style style:name="T5" style:family="text">
      <style:text-properties style:font-name="Times New Roman" fo:font-size="14pt" fo:font-style="normal" fo:font-weight="normal" style:font-size-asian="14pt" style:font-style-asian="normal" style:font-weight-asian="normal"/>
    </style:style>
    <style:style style:name="T6" style:family="text">
      <style:text-properties style:font-name="Times New Roman" fo:font-size="14pt" fo:font-style="normal" fo:font-weight="normal" style:font-size-asian="14pt" style:font-style-asian="normal" style:font-weight-asian="normal" style:font-weight-complex="normal"/>
    </style:style>
    <style:style style:name="T7" style:family="text">
      <style:text-properties style:font-name="Times New Roman" fo:font-size="14pt" fo:font-weight="bold" style:font-size-asian="14pt" style:font-weight-asian="bold"/>
    </style:style>
    <style:style style:name="T8" style:family="text">
      <style:text-properties style:font-name="Times New Roman" fo:font-size="14pt" fo:font-weight="normal" style:font-size-asian="14pt" style:font-weight-asian="normal" style:font-weight-complex="normal"/>
    </style:style>
    <style:style style:name="T9" style:family="text">
      <style:text-properties style:font-name="Times New Roman" fo:font-size="16pt" fo:font-style="normal" style:font-size-asian="16pt" style:font-style-asian="normal"/>
    </style:style>
    <style:style style:name="T10" style:family="text">
      <style:text-properties style:font-name="Times New Roman" fo:font-size="16pt" fo:font-style="normal" fo:font-weight="normal" style:font-size-asian="16pt" style:font-style-asian="normal" style:font-weight-asian="normal" style:font-weight-complex="normal"/>
    </style:style>
    <style:style style:name="T11" style:family="text">
      <style:text-properties style:font-name="Times New Roman" fo:font-size="13pt" style:font-size-asian="13pt"/>
    </style:style>
    <style:style style:name="T12" style:family="text">
      <style:text-properties style:font-name="Times New Roman" fo:font-size="13pt" fo:font-weight="bold" style:font-size-asian="13pt" style:font-weight-asian="bold"/>
    </style:style>
    <style:style style:name="T13" style:family="text">
      <style:text-properties style:font-name="Times New Roman" fo:font-style="normal" fo:font-weight="normal" style:font-style-asian="normal" style:font-weight-asian="normal"/>
    </style:style>
    <style:style style:name="T14" style:family="text">
      <style:text-properties style:font-name="Times New Roman" fo:font-style="normal" fo:font-weight="normal" style:font-style-asian="normal" style:font-weight-asian="normal" style:font-weight-complex="normal"/>
    </style:style>
    <style:style style:name="T15" style:family="text">
      <style:text-properties style:font-name="Times New Roman" fo:font-style="normal" style:font-style-asian="normal"/>
    </style:style>
    <style:style style:name="T16" style:family="text">
      <style:text-properties style:font-name="Times New Roman"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fig_vstup.jpg" draw:style-name="gr1" draw:text-style-name="P31" svg:width="11.999cm" svg:height="8.831cm" svg:x="0cm" svg:y="0cm">
        <draw:image xlink:href="Pictures/100000000000078000000585CE949DAA.jpg" xlink:type="simple" xlink:show="embed" xlink:actuate="onLoad">
          <text:p/>
        </draw:image>
      </draw:frame>
      <draw:frame text:anchor-type="page" text:anchor-page-number="0" draw:z-index="2" draw:name="fig_1_1.png" draw:style-name="gr1" draw:text-style-name="P31" svg:width="10.999cm" svg:height="10.999cm" svg:x="0cm" svg:y="0cm">
        <draw:image xlink:href="Pictures/100002010000037000000370CD450F8B.png" xlink:type="simple" xlink:show="embed" xlink:actuate="onLoad">
          <text:p/>
        </draw:image>
      </draw:frame>
      <draw:frame text:anchor-type="page" text:anchor-page-number="0" draw:z-index="3" draw:name="fig_1_2.png" draw:style-name="gr1" draw:text-style-name="P31" svg:width="14.999cm" svg:height="9.753cm" svg:x="0cm" svg:y="0cm">
        <draw:image xlink:href="Pictures/100002010000078A000004E70847261B.png" xlink:type="simple" xlink:show="embed" xlink:actuate="onLoad">
          <text:p/>
        </draw:image>
      </draw:frame>
      <draw:frame text:anchor-type="page" text:anchor-page-number="0" draw:z-index="4" draw:name="fig_1_3.png" draw:style-name="gr1" draw:text-style-name="P31" svg:width="14.999cm" svg:height="9.169cm" svg:x="0cm" svg:y="0cm">
        <draw:image xlink:href="Pictures/100002010000078A0000049C27745E83.png" xlink:type="simple" xlink:show="embed" xlink:actuate="onLoad">
          <text:p/>
        </draw:image>
      </draw:frame>
      <draw:frame text:anchor-type="page" text:anchor-page-number="0" draw:z-index="5" draw:name="fig_2_1.png" draw:style-name="gr1" draw:text-style-name="P31" svg:width="13.999cm" svg:height="17.864cm" svg:x="0cm" svg:y="0cm">
        <draw:image xlink:href="Pictures/100002010000065E00000820D3C06C6A.png" xlink:type="simple" xlink:show="embed" xlink:actuate="onLoad">
          <text:p/>
        </draw:image>
      </draw:frame>
      <draw:frame text:anchor-type="page" text:anchor-page-number="0" draw:z-index="6" draw:name="fig_3_1_orig.png" draw:style-name="gr1" draw:text-style-name="P31" svg:width="12.999cm" svg:height="15.105cm" svg:x="0cm" svg:y="0cm">
        <draw:image xlink:href="Pictures/10000201000002A70000031511816307.png" xlink:type="simple" xlink:show="embed" xlink:actuate="onLoad">
          <text:p/>
        </draw:image>
      </draw:frame>
      <draw:frame text:anchor-type="page" text:anchor-page-number="0" draw:z-index="7" draw:name="fig_3_2.png" draw:style-name="gr1" draw:text-style-name="P31" svg:width="11.999cm" svg:height="19.548cm" svg:x="0cm" svg:y="0cm">
        <draw:image xlink:href="Pictures/10000201000001CD000002EFFBF4E120.png" xlink:type="simple" xlink:show="embed" xlink:actuate="onLoad">
          <text:p/>
        </draw:image>
      </draw:frame>
      <draw:frame text:anchor-type="page" text:anchor-page-number="0" draw:z-index="8" draw:name="fig_5_1.png" draw:style-name="gr1" draw:text-style-name="P31" svg:width="14.999cm" svg:height="9.806cm" svg:x="0cm" svg:y="0cm">
        <draw:image xlink:href="Pictures/10000000000007EF0000053088356E81.png" xlink:type="simple" xlink:show="embed" xlink:actuate="onLoad">
          <text:p/>
        </draw:image>
      </draw:frame>
      <draw:frame text:anchor-type="page" text:anchor-page-number="0" draw:z-index="10" draw:name="fig_5_2.png" draw:style-name="gr1" draw:text-style-name="P31" svg:width="14.999cm" svg:height="9.806cm" svg:x="0cm" svg:y="0cm">
        <draw:image xlink:href="Pictures/10000000000007EF000005309D55F38F.png" xlink:type="simple" xlink:show="embed" xlink:actuate="onLoad">
          <text:p/>
        </draw:image>
      </draw:frame>
      <draw:frame text:anchor-type="page" text:anchor-page-number="0" draw:z-index="12" draw:name="fig_5_3.png" draw:style-name="gr1" draw:text-style-name="P31" svg:width="14.999cm" svg:height="9.806cm" svg:x="0cm" svg:y="0cm">
        <draw:image xlink:href="Pictures/10000000000007EF00000530A4C519A1.png" xlink:type="simple" xlink:show="embed" xlink:actuate="onLoad">
          <text:p/>
        </draw:image>
      </draw:frame>
      <draw:frame text:anchor-type="page" text:anchor-page-number="0" draw:z-index="14" draw:name="fig_5_4.png" draw:style-name="gr1" draw:text-style-name="P31" svg:width="14.999cm" svg:height="9.806cm" svg:x="0cm" svg:y="0cm">
        <draw:image xlink:href="Pictures/10000000000007EF000005301EF640F9.png" xlink:type="simple" xlink:show="embed" xlink:actuate="onLoad">
          <text:p/>
        </draw:image>
      </draw:frame>
      <draw:frame text:anchor-type="page" text:anchor-page-number="0" draw:z-index="16" draw:name="fig_5_5.png" draw:style-name="gr1" draw:text-style-name="P31" svg:width="14.999cm" svg:height="9.806cm" svg:x="0cm" svg:y="0cm">
        <draw:image xlink:href="Pictures/10000000000007EF0000053004AA250D.png" xlink:type="simple" xlink:show="embed" xlink:actuate="onLoad">
          <text:p/>
        </draw:image>
      </draw:frame>
      <text:p text:style-name="P8"><text:span text:style-name="T5">Міністерство освіти і науки України</text:span></text:p>
      <text:p text:style-name="P1"><text:span text:style-name="T5">Національний аерокосмічний університет</text:span></text:p>
      <text:p text:style-name="P9"><text:span text:style-name="T5">«Харківський авіаційний інститут»</text:span></text:p>
      <text:p text:style-name="P6"><text:span text:style-name="T13">Факультет інтелектуальних систем управління</text:span></text:p>
      <text:p text:style-name="P13"><text:span text:style-name="T13">Кафедра систем управління літальних апаратів (№301)</text:span></text:p>
      <text:p text:style-name="P14"><text:span text:style-name="T14">Пояснювальна записка до курсового проєкту</text:span></text:p>
      <text:p text:style-name="P14"><text:span text:style-name="T14">Освітній ступінь: магістр</text:span></text:p>
      <text:p text:style-name="P14"><text:span text:style-name="T14">на тему: «Задача стабілізації кута крену БПЛА-квадрокоптера Х-подібної схеми»</text:span></text:p>
      <text:p text:style-name="P17"><text:span text:style-name="T4">ХАІ.301.340.25В.173.096505</text:span><text:span text:style-name="T3">14 ПЗ</text:span></text:p>
      <text:p text:style-name="P5"><text:span text:style-name="T13">Виконав: здобувач другого (магістерського) рівня вищої освіти,</text:span></text:p>
      <text:p text:style-name="P5"><text:span text:style-name="T13">групи 350, галузь знань 17 «Електроніка та телекомунікації»,</text:span></text:p>
      <text:p text:style-name="P5"><text:span text:style-name="T13">спеціальність 173 «Авіоніка», освітня програма «Системи автономної</text:span></text:p>
      <text:p text:style-name="P16"><text:span text:style-name="T13">навігації та адаптивного управління літальних апаратів»</text:span></text:p>
      <text:p text:style-name="P5"><text:span text:style-name="T13">Виконав <text:s/>___________________ <text:s/>здобувач Воловик Є.Є.</text:span></text:p>
      <text:p text:style-name="P11"><text:span text:style-name="T13"><text:s text:c="100"/>(прізвище та ініціали)</text:span></text:p>
      <text:p text:style-name="P5"><text:span text:style-name="T13">Керівник <text:s/>___________________ <text:s/>доцент Сокол Д.В.</text:span></text:p>
      <text:p text:style-name="P12"><text:span text:style-name="T13"><text:s text:c="100"/>(прізвище та ініціали)</text:span></text:p>
      <text:p text:style-name="P1"><text:span text:style-name="T5">Харків — 2026</text:span></text:p>
      <text:p text:style-name="P1"><text:span text:style-name="T5"/></text:p>
      <text:p text:style-name="P1"><text:soft-page-break/><text:span text:style-name="T5"/></text:p>
      <text:p text:style-name="P10"><text:span text:style-name="T2">ЗМІСТ</text:span></text:p>
      <text:p text:style-name="P18"><text:span text:style-name="T5">ПРИЙНЯТІ ПОЗНАЧЕННЯ ТА ПАРАМЕТРИ МОДЕЛІ</text:span></text:p>
      <text:p text:style-name="P18"><text:span text:style-name="T5">ВСТУП</text:span></text:p>
      <text:p text:style-name="P18"><text:span text:style-name="T5">1 СТАН ПРОБЛЕМИ СТАБІЛІЗАЦІЇ КУТА КРЕНУ БПЛА-КВАДРОКОПТЕРА Х-ПОДІБНОЇ СХЕМИ</text:span></text:p>
      <text:p text:style-name="P18"><text:span text:style-name="T5"><text:s text:c="3"/>1.1 Загальна характеристика проблеми</text:span></text:p>
      <text:p text:style-name="P18"><text:span text:style-name="T5"><text:s text:c="3"/>1.2 Аналіз дестабілізуючих впливів у каналі крену</text:span></text:p>
      <text:p text:style-name="P18"><text:span text:style-name="T5"><text:s text:c="3"/>1.3 Аналіз підходів до стабілізації кута крену квадрокоптера</text:span></text:p>
      <text:p text:style-name="P18"><text:span text:style-name="T5">2 ОПИС ФУНКЦІОНУВАННЯ ОБ’ЄКТА СИСТЕМИ АВТОМАТИЧНОЇ СТАБІЛІЗАЦІЇ КУТА КРЕНУ</text:span></text:p>
      <text:p text:style-name="P18"><text:span text:style-name="T5"><text:s text:c="3"/>2.1 Аналіз властивостей об’єкта стабілізації</text:span></text:p>
      <text:p text:style-name="P18"><text:span text:style-name="T5"><text:s text:c="3"/>2.2 Вибір і обґрунтування функціональної схеми системи автоматичної стабілізації</text:span></text:p>
      <text:p text:style-name="P18"><text:span text:style-name="T5"><text:s text:c="3"/>2.3 Обґрунтування вибору функціональних елементів</text:span></text:p>
      <text:p text:style-name="P18"><text:span text:style-name="T5">3 МАТЕМАТИЧНИЙ ОПИС ОБ’ЄКТА СИСТЕМИ АВТОМАТИЧНОЇ СТАБІЛІЗАЦІЇ КУТА КРЕНУ</text:span></text:p>
      <text:p text:style-name="P18"><text:span text:style-name="T5"><text:s text:c="3"/>3.1 Математична модель об’єкта та елементів системи у просторі станів</text:span></text:p>
      <text:p text:style-name="P18"><text:span text:style-name="T5"><text:s text:c="3"/>3.2 Побудова структурної схеми системи автоматичної стабілізації</text:span></text:p>
      <text:p text:style-name="P18"><text:span text:style-name="T5"><text:s text:c="3"/>3.3 Застосування фільтра Калмана</text:span></text:p>
      <text:p text:style-name="P18"><text:span text:style-name="T5"><text:s text:c="3"/>3.4 Моделювання динаміки системи автоматичної стабілізації при заданих початкових умовах і зовнішніх впливах</text:span></text:p>
      <text:p text:style-name="P18"><text:span text:style-name="T5">4 ФОРМУВАННЯ РЕГУЛЯТОРА СИСТЕМИ АВТОМАТИЧНОЇ СТАБІЛІЗАЦІЇ КУТА КРЕНУ</text:span></text:p>
      <text:p text:style-name="P18"><text:span text:style-name="T5"><text:s text:c="3"/>4.1 Синтез закону стабілізації</text:span></text:p>
      <text:p text:style-name="P18"><text:span text:style-name="T5"><text:s text:c="3"/>4.2 Моделювання динаміки замкненої системи автоматичної стабілізації при заданих початкових умовах і зовнішніх впливах</text:span></text:p>
      <text:p text:style-name="P18"><text:span text:style-name="T5">5 АНАЛІЗ РЕЗУЛЬТАТІВ МОДЕЛЮВАННЯ</text:span></text:p>
      <text:p text:style-name="P18"><text:soft-page-break/><text:span text:style-name="T5">ЗАКЛЮЧЕННЯ</text:span></text:p>
      <text:p text:style-name="P18"><text:span text:style-name="T5">СПИСОК ВИКОРИСТАНИХ ДЖЕРЕЛ</text:span></text:p>
      <text:p text:style-name="P18"><text:span text:style-name="T5"/></text:p>
      <text:p text:style-name="P19"><text:span text:style-name="T2">ПРИЙНЯТІ ПОЗНАЧЕННЯ ТА ПАРАМЕТРИ МОДЕЛІ</text:span></text:p>
      <text:p text:style-name="P2"><text:span text:style-name="T5">φ — кут крену квадрокоптера, рад;</text:span></text:p>
      <text:p text:style-name="P2"><text:span text:style-name="T5">p — кутова швидкість у каналі крену, рад/с;</text:span></text:p>
      <text:p text:style-name="P2"><text:span text:style-name="T5">M_u — керуючий момент у каналі крену, Н·м;</text:span></text:p>
      <text:p text:style-name="P2"><text:span text:style-name="T5">M_d — збурюючий момент у каналі крену, Н·м;</text:span></text:p>
      <text:p text:style-name="P2"><text:span text:style-name="T5">M_φ — сумарний момент у каналі крену, Н·м;</text:span></text:p>
      <text:p text:style-name="P2"><text:span text:style-name="T5">u(t) — керуючий сигнал регулятора;</text:span></text:p>
      <text:p text:style-name="P2"><text:span text:style-name="T5">u_sat(t) — керуючий сигнал з урахуванням насичення виконавчого каналу;</text:span></text:p>
      <text:p text:style-name="P2"><text:span text:style-name="T5">e(t) — похибка стабілізації;</text:span></text:p>
      <text:p text:style-name="P2"><text:span text:style-name="T5">z(t) — інтегральна координата регулятора;</text:span></text:p>
      <text:p text:style-name="P2"><text:span text:style-name="T5">J_x — момент інерції квадрокоптера відносно поздовжньої осі, кг·м²;</text:span></text:p>
      <text:p text:style-name="P2"><text:span text:style-name="T5">c_φ — коефіцієнт демпфування в каналі крену, Н·м·с/рад;</text:span></text:p>
      <text:p text:style-name="P2"><text:span text:style-name="T5">T_a — стала часу виконавчого каналу, с;</text:span></text:p>
      <text:p text:style-name="P2"><text:span text:style-name="T5">k_a — коефіцієнт підсилення виконавчого каналу;</text:span></text:p>
      <text:p text:style-name="P2"><text:span text:style-name="T5">k_φ — коефіцієнт підсилення за кутом крену;</text:span></text:p>
      <text:p text:style-name="P2"><text:span text:style-name="T5">k_z — коефіцієнт інтегральної складової регулятора;</text:span></text:p>
      <text:p text:style-name="P2"><text:span text:style-name="T5">k_p — коефіцієнт зворотного зв’язку за кутовою швидкістю;</text:span></text:p>
      <text:p text:style-name="P2"><text:span text:style-name="T5">k_aw — коефіцієнт anti-windup-корекції;</text:span></text:p>
      <text:p text:style-name="P2"><text:span text:style-name="T5">x(t) — вектор стану системи;</text:span></text:p>
      <text:p text:style-name="P2"><text:span text:style-name="T5">x₁ = φ, x₂ = p, x₃ = M_u — компоненти вектора стану;</text:span></text:p>
      <text:p text:style-name="P2"><text:span text:style-name="T5">y(t) — вектор вимірюваних сигналів;</text:span></text:p>
      <text:p text:style-name="P2"><text:span text:style-name="T5">n_φ(t), n_p(t) — шуми вимірювання кута крену та кутової швидкості;</text:span></text:p>
      <text:p text:style-name="P2"><text:span text:style-name="T5">φ̂(t), p̂(t) — оцінки кута крену та кутової швидкості (фільтр Калмана);</text:span></text:p>
      <text:p text:style-name="P2"><text:span text:style-name="T5">Q, R — матриці коваріації шуму процесу та вимірювання;</text:span></text:p>
      <text:p text:style-name="P2"><text:span text:style-name="T5">P — матриця коваріації похибки оцінювання;</text:span></text:p>
      <text:p text:style-name="P2"><text:span text:style-name="T5">K(k) — матриця підсилення Калмана;</text:span></text:p>
      <text:p text:style-name="P2"><text:span text:style-name="T5">r(k) — інновація фільтра Калмана;</text:span></text:p>
      <text:p text:style-name="P2"><text:soft-page-break/><text:span text:style-name="T5">A, B, C, E — матриці моделі в просторі станів;</text:span></text:p>
      <text:p text:style-name="P2"><text:span text:style-name="T5">A_d, B_d, E_d — дискретизовані матриці моделі;</text:span></text:p>
      <text:p text:style-name="P2"><text:span text:style-name="T5">T₀ — період дискретизації, с;</text:span></text:p>
      <text:p text:style-name="P2"><text:span text:style-name="T5"><text:s/></text:span></text:p>
      <text:p text:style-name="P20"><text:span text:style-name="T5">У роботі вектор стану об’єкта приймається у вигляді</text:span></text:p>
      <text:p text:style-name="P25"><text:span text:style-name="T2">x(t) = [x₁, x₂, x₃]ᵀ = [φ(t), p(t), M_u(t)]ᵀ.</text:span></text:p>
      <text:p text:style-name="P25"><text:span text:style-name="T2"/></text:p>
      <text:p text:style-name="P27"><text:span text:style-name="T2">ВСТУП</text:span></text:p>
      <text:p text:style-name="P20"><text:span text:style-name="T5">Безпілотні літальні апарати (БПЛА) широко застосовуються у військовій, цивільній, науковій та промисловій сферах. Їх використовують для повітряного спостереження, моніторингу територій, аерофотозйомки, інспектування об’єктів, картографування, пошуково-рятувальних робіт і доставки малогабаритних вантажів [1, 4].</text:span></text:p>
      <text:p text:style-name="P20"><text:span text:style-name="T5">Серед різних типів БПЛА особливе місце посідають мультикоптери, зокрема квадрокоптери. Їх перевагами є маневреність, можливість вертикального зльоту і посадки, зависання та робота в умовах обмеженого простору [3, 6].</text:span></text:p>
      <text:p text:style-name="P28"><draw:frame draw:style-name="fr1" text:anchor-type="as-char" svg:width="12cm" svg:height="8.832cm" draw:z-index="1"><draw:image xlink:href="Pictures/100000000000078000000585CE949DAA.jpg" xlink:type="simple" xlink:show="embed" xlink:actuate="onLoad"/></draw:frame></text:p>
      <text:p text:style-name="P15"><text:span text:style-name="T2">Рисунок 1 — БПЛА-квадрокоптер Х-подібної схеми</text:span></text:p>
      <text:p text:style-name="P20"><text:soft-page-break/><text:span text:style-name="T5">Ефективність роботи квадрокоптера значною мірою залежить від якості системи автоматичної стабілізації [4]. Через відсутність розвинених поверхонь, які забезпечують пасивну стійкість, просторове положення апарата підтримується лише безперервною зміною тяги електродвигунів. Тому квадрокоптер у цій роботі розглядається як об’єкт системи автоматичної стабілізації кута крену.</text:span></text:p>
      <text:p text:style-name="P20"><text:span text:style-name="T5">Робота обмежується каналом крену БПЛА-квадрокоптера Х-подібної схеми з центральним розміщенням центра мас. Така постановка дозволяє зосередити увагу на одній задачі — стабілізації кута крену під дією збурень.</text:span></text:p>
      <text:p text:style-name="P20"><text:span text:style-name="T5">Актуальність теми зумовлена необхідністю забезпечення стійкої та точної стабілізації квадрокоптера в реальних умовах польоту. На апарат можуть діяти пориви вітру, турбулентність, локальні аеродинамічні впливи, параметричні відхилення, інерційність виконавчих органів, обмеження керуючого сигналу та похибки вимірювальної системи [1, 6, 7]. Ці фактори погіршують якість стабілізації та потребують побудови відповідної математичної моделі, функціональної схеми і регулятора.</text:span></text:p>
      <text:p text:style-name="P20"><text:span text:style-name="T5">Метою курсової роботи є формування функціональної схеми та математичної моделі БПЛА-квадрокоптера Х-подібної схеми з центральним розміщенням центра мас у каналі крену, а також синтез регулятора системи автоматичної стабілізації, який забезпечує стійкість і необхідні показники якості перехідного процесу.</text:span></text:p>
      <text:p text:style-name="P20"><text:span text:style-name="T5">Для досягнення поставленої мети необхідно вирішити такі завдання:</text:span></text:p>
      <text:p text:style-name="P29"><text:span text:style-name="T2">– проаналізувати стан проблеми стабілізації кута крену квадрокоптера;</text:span></text:p>
      <text:p text:style-name="P29"><text:span text:style-name="T2">– розглянути властивості квадрокоптера як об’єкта стабілізації;</text:span></text:p>
      <text:p text:style-name="P29"><text:span text:style-name="T2">– сформувати функціональну схему системи автоматичної стабілізації;</text:span></text:p>
      <text:p text:style-name="P29"><text:span text:style-name="T2">– обґрунтувати вибір основних функціональних елементів системи;</text:span></text:p>
      <text:p text:style-name="P29"><text:span text:style-name="T2">– побудувати математичні моделі об’єкта та елементів системи безпосередньо у просторі станів;</text:span></text:p>
      <text:p text:style-name="P29"><text:span text:style-name="T2">– сформувати структурну схему системи стабілізації;</text:span></text:p>
      <text:p text:style-name="P29"><text:span text:style-name="T2">– розглянути застосування фільтра Калмана для оцінювання стану;</text:span></text:p>
      <text:p text:style-name="P29"><text:soft-page-break/><text:span text:style-name="T2">– здійснити синтез регулятора системи стабілізації кута крену;</text:span></text:p>
      <text:p text:style-name="P29"><text:span text:style-name="T2">– виконати моделювання динаміки системи при заданих початкових умовах і зовнішніх впливах;</text:span></text:p>
      <text:p text:style-name="P29"><text:span text:style-name="T2">– оцінити показники якості перехідних процесів.</text:span></text:p>
      <text:p text:style-name="P20"><text:span text:style-name="T5">Об’єктом дослідження є процес стабілізації кута крену БПЛА-квадрокоптера Х-подібної схеми з симетричним розташуванням чотирьох електродвигунів і центральним розміщенням центра мас.</text:span></text:p>
      <text:p text:style-name="P20"><text:span text:style-name="T5">Предметом дослідження є функціональна схема, математична модель, регулятор та динамічні характеристики системи автоматичної стабілізації кута крену квадрокоптера.</text:span></text:p>
      <text:p text:style-name="P20"><text:span text:style-name="T5">У роботі використано методи класичної теорії автоматичного управління, математичного та структурного моделювання, лінеаризації рівнянь руху, аналізу перехідних процесів і фільтрації вимірювальної інформації [8, 9, 10, 11].</text:span></text:p>
      <text:p text:style-name="P20"><text:span text:style-name="T5">Практичне значення одержаних результатів полягає у можливості використання сформованої функціональної схеми, математичної моделі та регулятора для аналізу процесів стабілізації малорозмірних БПЛА мультикоптерного типу, а також для подальшого комп’ютерного моделювання систем стабілізації.</text:span></text:p>
      <text:p text:style-name="P20"><text:span text:style-name="T5"/></text:p>
      <text:p text:style-name="P22"><text:span text:style-name="T2">1 СТАН ПРОБЛЕМИ СТАБІЛІЗАЦІЇ КУТА КРЕНУ БПЛА-КВАДРОКОПТЕРА Х-ПОДІБНОЇ СХЕМИ</text:span></text:p>
      <text:p text:style-name="P23"><text:span text:style-name="T2">1.1 Загальна характеристика проблеми</text:span></text:p>
      <text:p text:style-name="P20"><text:span text:style-name="T5">Безпілотні літальні апарати мультикоптерного типу пройшли шлях від простих платформ із ручним дистанційним керуванням до сучасних систем із цифровими регуляторами, інерціальними датчиками, бортовими обчислювальними засобами та алгоритмами автоматичної стабілізації [1, 4, 6]. Завдяки цьому сучасні квадрокоптери виконують не лише зліт, зависання і </text:span><text:soft-page-break/><text:span text:style-name="T5">посадку, а й складні польотні завдання в автоматичному або напівавтоматичному режимі.</text:span></text:p>
      <text:p text:style-name="P20"><text:span text:style-name="T5">Квадрокоптер є багатоканальним літальним апаратом, рух якого забезпечується зміною частот обертання чотирьох повітряних гвинтів. У Х-подібній схемі двигуни розміщені симетрично відносно центра рами, а сусідні гвинти обертаються у протилежних напрямках. Це дає змогу компенсувати реактивні моменти та формувати керуючі моменти в каналах крену, тангажу і рискання [1, 4, 6].</text:span></text:p>
      <text:p text:style-name="P20"><text:span text:style-name="T5">Розташування роторів і канали обертання Х-подібної схеми зображено на рисунку 1.1. Канал крену відповідає за обертання навколо поздовжньої осі x; саме він є предметом подальшого дослідження.</text:span></text:p>
      <text:p text:style-name="P28"><draw:frame draw:style-name="fr2" draw:name="graphics1" text:anchor-type="paragraph" svg:width="15.99cm" svg:height="9.908cm" draw:z-index="18"><draw:image xlink:href="Pictures/10000201000006F7000004020615F5E4.png" xlink:type="simple" xlink:show="embed" xlink:actuate="onLoad"/></draw:frame></text:p>
      <text:p text:style-name="P15"><text:span text:style-name="T2">Рисунок 1.1 — Канали обертання БПЛА-квадрокоптера Х-подібної схеми</text:span></text:p>
      <text:p text:style-name="P20"><text:span text:style-name="T5">Через відсутність розвинених аеродинамічних поверхонь квадрокоптер не має пасивної стійкості, властивої літальним апаратам класичної аеродинамічної схеми. Його положення в просторі підтримується лише безперервним керуванням тягою електродвигунів, тому навіть невеликі </text:span><text:soft-page-break/><text:span text:style-name="T5">порушення балансу сил і моментів призводять до зміни кутового положення апарата [3, 4].</text:span></text:p>
      <text:p text:style-name="P20"><text:span text:style-name="T5">У реальних умовах польоту на квадрокоптер діють як зовнішні, так і внутрішні збурення. До зовнішніх належать пориви вітру, турбулентність, локальні аеродинамічні впливи поблизу перешкод, зміни параметрів атмосфери. До внутрішніх факторів — параметричні відхилення масово-інерційних характеристик, неідеальне розташування центра мас, відмінності параметрів двигунів і гвинтів, інерційність виконавчих органів, цифрові затримки та похибки вимірювальної системи [1, 6, 7].</text:span></text:p>
      <text:p text:style-name="P20"><text:span text:style-name="T5">Особливе значення має канал крену, оскільки кут крену визначає нахил апарата відносно поздовжньої осі та впливає на поперечну стабілізацію. Порушення стабілізації в цьому каналі погіршує точність зависання, знижує стійкість польоту та ускладнює виконання польотного завдання [4].</text:span></text:p>
      <text:p text:style-name="P20"><text:span text:style-name="T5">Проблема стабілізації кута крену полягає в необхідності підтримувати задане значення кута крену або швидко повертати апарат до нього після дії збурення. Для цього система автоматичної стабілізації повинна забезпечувати стійкість, достатню швидкодію, обмежене перерегулювання, малу статичну похибку та завадостійкість [10, 11].</text:span></text:p>
      <text:p text:style-name="P20"><text:span text:style-name="T5">Отже, проблема стабілізації кута крену квадрокоптера зумовлена динамічною нестійкістю об’єкта, дією зовнішніх і внутрішніх збурень, інерційністю виконавчих органів та похибками вимірювання. Це визначає необхідність аналізу дестабілізуючих впливів, формування функціональної схеми, побудови математичної моделі та синтезу регулятора, що виконано в наступних розділах.</text:span></text:p>
      <text:p text:style-name="P23"><text:span text:style-name="T2">1.2 Аналіз дестабілізуючих впливів у каналі крену</text:span></text:p>
      <text:p text:style-name="P20"><text:span text:style-name="T5">Стійкість квадрокоптера в каналі крену визначається здатністю системи автоматичної стабілізації підтримувати заданий кут крену або швидко відновлювати його після дії збурень. У реальних умовах польоту на апарат діють фактори різної фізичної природи, які доцільно поділити на </text:span><text:soft-page-break/><text:span text:style-name="T5">зовнішні (з боку навколишнього середовища) та внутрішні (пов’язані з конструкцією та вимірювальною системою) [1, 6, 7]. Класифікація дестабілізуючих впливів подана на рисунку 1.2.</text:span></text:p>
      <text:p text:style-name="P28"><draw:frame draw:style-name="fr3" draw:name="graphics2" text:anchor-type="paragraph" svg:width="16.364cm" svg:height="10.73cm" draw:z-index="19"><draw:image xlink:href="Pictures/100002010000078A000004E70847261B.png" xlink:type="simple" xlink:show="embed" xlink:actuate="onLoad"/></draw:frame></text:p>
      <text:p text:style-name="P15"><text:span text:style-name="T2">Рисунок 1.2 — Класифікація дестабілізуючих впливів у каналі крену</text:span></text:p>
      <text:p text:style-name="P20"><text:span text:style-name="T5">Найбільш характерним зовнішнім збуренням є вітер. Повітряний потік створює додаткові аеродинамічні сили та моменти, які можуть викликати відхилення кута крену; особливо небезпечні пориви вітру через випадковий характер і швидку зміну навантаження [4, 6].</text:span></text:p>
      <text:p text:style-name="P20"><text:span text:style-name="T5">Турбулентність атмосфери спричиняє випадкові зміни швидкості та напряму повітряного потоку. У режимах зависання, зльоту, посадки або повільного маневрування навіть малі турбулентні впливи помітно змінюють кутове положення апарата [6]. До зовнішніх збурень також належать локальні аеродинамічні впливи поблизу будівель, дерев, вертикальних конструкцій, а також зміни густини повітря, температури і вологості.</text:span></text:p>
      <text:p text:style-name="P20"><text:span text:style-name="T5">До внутрішніх дестабілізуючих факторів належать зміщення центра мас відносно геометричного центра рами, відмінності характеристик </text:span><text:soft-page-break/><text:span text:style-name="T5">електродвигунів і гвинтів, інерційність виконавчих органів, зміна масово-інерційних характеристик, цифрові затримки та похибки вимірювальної системи [1, 7].</text:span></text:p>
      <text:p text:style-name="P20"><text:span text:style-name="T5">Зміщення центра мас може створювати додаткові моменти навіть за симетричного розподілу тяги. Неідентичність двигунів і гвинтів призводить до того, що за однакових командних сигналів вони створюють різну тягу; у результаті виникає асиметрія сил, яка безпосередньо впливає на кутове прискорення в каналі крену. Виконавчі органи мають власну інерційність: електродвигуни та гвинти не можуть миттєво змінити тягу після зміни керуючого сигналу, тому між командою регулятора та фактичним керуючим моментом виникає затримка [1, 4].</text:span></text:p>
      <text:p text:style-name="P20"><text:span text:style-name="T5">Окреме значення мають похибки вимірювальної системи. Для оцінювання кута крену та кутової швидкості використовуються гіроскопи, акселерометри та інші датчики; їхні сигнали містять шуми, дрейф, зміщення нуля та похибки дискретизації, через що регулятор отримує неточну інформацію про поточний стан апарата [8, 9].</text:span></text:p>
      <text:p text:style-name="P20"><text:span text:style-name="T5">Таким чином, на стабілізацію кута крену впливають дестабілізуючі фактори різної природи. Їх урахування є необхідним для побудови функціональної схеми, математичної моделі та регулятора системи автоматичної стабілізації, що розглядаються далі.</text:span></text:p>
      <text:p text:style-name="P23"><text:span text:style-name="T2">1.3 Аналіз підходів до стабілізації кута крену квадрокоптера</text:span></text:p>
      <text:p text:style-name="P20"><text:span text:style-name="T5">Для розв’язання задачі стабілізації кута крену застосовують різні підходи, які відрізняються складністю реалізації, вимогами до математичної моделі та чутливістю до збурень і похибок вимірювання. Узагальнена класифікація підходів подана на рисунку 1.3.</text:span></text:p>
      <text:p text:style-name="P28"><draw:frame draw:style-name="fr4" draw:name="graphics3" text:anchor-type="paragraph" svg:x="0.153cm" svg:y="0.43cm" svg:width="16.193cm" svg:height="11.208cm" draw:z-index="20"><draw:image xlink:href="Pictures/100002010000078A0000049C27745E83.png" xlink:type="simple" xlink:show="embed" xlink:actuate="onLoad"/></draw:frame><text:soft-page-break/></text:p>
      <text:p text:style-name="P15"><text:span text:style-name="T2">Рисунок 1.3 — Класифікація підходів до стабілізації кута крену</text:span></text:p>
      <text:p text:style-name="P20"><text:span text:style-name="T5">Найпоширенішим підходом є використання регуляторів класичної структури: пропорційних (П), пропорційно-диференціальних (ПД) та пропорційно-інтегрально-диференціальних (ПІД). Їх перевагами є простота реалізації, наочність налаштування та можливість отримати прийнятну якість перехідного процесу без значного ускладнення системи [10, 11].</text:span></text:p>
      <text:p text:style-name="P20"><text:span text:style-name="T5">Для квадрокоптерів також застосовують каскадну структуру стабілізації: зовнішній контур відповідає за стабілізацію кута крену, а внутрішній — за стабілізацію кутової швидкості. Такий поділ підвищує швидкодію системи та покращує реакцію на збурення [1, 2, 4].</text:span></text:p>
      <text:p text:style-name="P20"><text:span text:style-name="T5">Окрім класичних регуляторів, використовують методи, засновані на моделі у просторі станів: регулятор зі зворотним зв’язком за станом, лінійно-квадратичний регулятор (ЛКР). Ці методи дають змогу цілеспрямовано формувати показники якості системи, але потребують точнішої математичної моделі об’єкта [10, 12].</text:span></text:p>
      <text:p text:style-name="P20"><text:soft-page-break/><text:span text:style-name="T5">Важливим елементом сучасних систем стабілізації є оцінювання стану об’єкта. Для квадрокоптера це особливо важливо, оскільки сигнали гіроскопів, акселерометрів та інших датчиків містять шуми, дрейф і похибки вимірювання. Найбільш поширеним є застосування фільтра Калмана або його модифікацій [8, 9, 12]. Цей блок може поєднуватися з будь-яким із наведених підходів до синтезу регулятора.</text:span></text:p>
      <text:p text:style-name="P20"><text:span text:style-name="T5">У межах цієї роботи застосовано класичний підхід: побудовано лінеаризовану математичну модель каналу крену, сформовано функціональну схему та синтезовано ПІ-регулятор з демпфувальним зворотним зв’язком за кутовою швидкістю. Для оцінювання вектора стану використовується дискретний фільтр Калмана. Такий вибір обґрунтований тим, що досліджується один канал руху поблизу положення рівноваги, а ПІ-структура з демпфувальним зв’язком забезпечує необхідну стійкість, швидкодію і малу статичну похибку при простоті реалізації [10, 11].</text:span></text:p>
      <text:p text:style-name="P20"><text:span text:style-name="T5">Отже, аналіз існуючих підходів показав, що для розв’язання поставленої задачі найбільш обґрунтованим є поєднання регулятора класичної структури з фільтром Калмана для оцінювання стану.</text:span></text:p>
      <text:p text:style-name="P20"><text:span text:style-name="T5"/></text:p>
      <text:p text:style-name="P22"><text:span text:style-name="T2">2 ОПИС ФУНКЦІОНУВАННЯ ОБ’ЄКТА СИСТЕМИ АВТОМАТИЧНОЇ СТАБІЛІЗАЦІЇ КУТА КРЕНУ</text:span></text:p>
      <text:p text:style-name="P23"><text:span text:style-name="T2">2.1 Аналіз властивостей об’єкта стабілізації</text:span></text:p>
      <text:p text:style-name="P20"><text:span text:style-name="T5">Об’єктом стабілізації в цій курсовій роботі є БПЛА-квадрокоптер Х-подібної схеми з симетричним розташуванням чотирьох електродвигунів і центральним розміщенням центра мас. Розглядається лише канал крену, тобто обертання апарата навколо поздовжньої осі.</text:span></text:p>
      <text:p text:style-name="P20"><text:span text:style-name="T5">У каналі крену керуючий момент формується за рахунок різниці тяг між парами двигунів, розташованими по різні боки поздовжньої осі. Вхідним впливом для об’єкта є керуючий момент M_u у каналі крену; вихідними координатами — кут крену φ та кутова швидкість p [1, 4, 6].</text:span></text:p>
      <text:p text:style-name="P20"><text:soft-page-break/><text:span text:style-name="T5">Основні властивості квадрокоптера як об’єкта стабілізації:</text:span></text:p>
      <text:p text:style-name="P29"><text:span text:style-name="T2">– динамічна нестійкість — за відсутності керування невеликі збурення спричиняють зростання відхилення кута крену [3, 4];</text:span></text:p>
      <text:p text:style-name="P29"><text:span text:style-name="T2">– інерційність — зміна керуючого сигналу не одразу призводить до зміни кута крену; між сигналом і виникненням керуючого моменту присутня затримка через інерційність ЕРО, двигунів і гвинтів [1, 6];</text:span></text:p>
      <text:p text:style-name="P29"><text:span text:style-name="T2">– нелінійність — реальні залежності між тягою, моментами та координатами руху мають нелінійний характер, проте поблизу положення рівноваги доцільно застосовувати лінеаризований опис [7, 10].</text:span></text:p>
      <text:p text:style-name="P20"><text:span text:style-name="T5">Збурюючий вплив на квадрокоптер у роботі приймається у вигляді узагальненого зовнішнього моменту M_d(t), прикладеного безпосередньо до корпусу апарата в каналі крену. Такий підхід відповідає опису дії вітру або аеродинамічного збурення на конструкцію апарата; збурення на рівні окремих двигунів, ЕРО або пропелерів не розглядаються.</text:span></text:p>
      <text:p text:style-name="P20"><text:span text:style-name="T5">На стабілізацію також впливають похибки вимірювального каналу. Для оцінювання кута крену використовуються сигнали датчиків, які містять шуми, зміщення нуля та похибки дискретизації [8, 9]. Тому об’єкт стабілізації доцільно розглядати разом із вимірювальним каналом, а для підвищення точності оцінювання стану — застосовувати фільтрацію вимірювальної інформації.</text:span></text:p>
      <text:p text:style-name="P20"><text:span text:style-name="T5">Необхідно враховувати обмеження виконавчих органів: електродвигуни та повітряні гвинти мають граничні значення тяги, тому система не може формувати довільно великі керуючі сигнали. За значних відхилень або сильних збурень можливе насичення виконавчого каналу, що впливає на якість перехідного процесу.</text:span></text:p>
      <text:p text:style-name="P20"><text:span text:style-name="T5">Таким чином, БПЛА-квадрокоптер у каналі крену — це динамічно нестійкий, інерційний і нелінійний об’єкт, який працює в умовах зовнішніх збурень, параметричних відхилень, шумів вимірювання та обмежень виконавчих органів. Поблизу положення рівноваги об’єкт може бути </text:span><text:soft-page-break/><text:span text:style-name="T5">описаний лінеаризованою моделлю, придатною для подальшого аналізу та синтезу регулятора.</text:span></text:p>
      <text:p text:style-name="P20"><text:span text:style-name="T5"/></text:p>
      <text:p text:style-name="P23"><text:span text:style-name="T2">2.2 Вибір і обґрунтування функціональної схеми системи автоматичної стабілізації</text:span></text:p>
      <text:p text:style-name="P20"><text:span text:style-name="T5">Функціональна схема визначає склад основних елементів системи, напрямки передавання сигналів, вхідні та вихідні величини, канал збурення і логіку взаємодії між регулятором, виконавчим каналом, об’єктом стабілізації та вимірювальними засобами.</text:span></text:p>
      <text:p text:style-name="P20"><text:span text:style-name="T5">Оскільки квадрокоптер є динамічно нестійким об’єктом, система автоматичної стабілізації побудована як замкнена з від’ємним зворотним зв’язком. Це дає змогу порівнювати задане значення кута крену з оціненим поточним, формувати похибку стабілізації та компенсувати дію збурень [10, 11].</text:span></text:p>
      <text:p text:style-name="P20"><text:span text:style-name="T5">До складу схеми входять такі елементи: задавальний пристрій (формує бажане значення кута крену φ_з); вузол порівняння Σ1 (формує похибку e(t) = φ_з − φ̂); регулятор системи автоматичної стабілізації; блок насичення; виконавчий канал; вузол сумування керуючого і збурюючого моментів Σ2; об’єкт стабілізації (БПЛА-квадрокоптер у каналі крену); вимірювальний блок (датчики кута крену та кутової швидкості); блок оцінювання стану на основі фільтра Калмана; канал від’ємного зворотного зв’язку за оцінками φ̂(t) і p̂(t).</text:span></text:p>
      <text:p text:style-name="P20"><text:span text:style-name="T5">Функціональна схема, побудована з урахуванням наведених елементів, подана на рисунку 2.1. У схемі враховано вимогу: кожна передавальна функція має один вхід і один вихід. Оскільки об’єкт стабілізації має один вхід (сумарний момент M_φ) і два виходи (кут крену φ та кутову швидкість p), він описаний двома передавальними функціями: W_о,φ(s) — за кутом крену та W_о,p(s) — за кутовою швидкістю. Аналогічно вимірювальний блок поділено на два канали: датчик кута крену W_д,φ(s) і гіроскоп W_д,p(s). Виконавчий канал у функціональній схемі подано в узагальненому вигляді </text:span><text:soft-page-break/><text:span text:style-name="T5">одним блоком; його деталізація на рівні чотирьох окремих роторів виконується в підрозділі 3.2 під час побудови структурної схеми.</text:span></text:p>
      <text:p text:style-name="P28"><draw:frame draw:style-name="fr3" draw:name="graphics4" text:anchor-type="paragraph" svg:width="16.235cm" svg:height="21.082cm" draw:z-index="21"><draw:image xlink:href="Pictures/100002010000065C00000820E6C51BD8.png" xlink:type="simple" xlink:show="embed" xlink:actuate="onLoad"/></draw:frame></text:p>
      <text:p text:style-name="P15"><text:span text:style-name="T2">Рисунок 2.1 — Функціональна схема системи автоматичної стабілізації<text:line-break/>кута крену БПЛА-квадрокоптера</text:span></text:p>
      <text:p text:style-name="P20"><text:soft-page-break/><text:span text:style-name="T5">Особливістю схеми є те, що блок насичення передає сигнал u_sat(t) не лише на виконавчий канал, а й на блок оцінювання стану (показано пунктиром). Це необхідно тому, що фільтр Калмана використовує фактичний керуючий сигнал на етапі прогнозування стану [8, 9].</text:span></text:p>
      <text:p text:style-name="P20"><text:span text:style-name="T5">Отже, обрана функціональна схема відповідає задачі стабілізації кута крену та є основою для подальшого математичного опису системи в просторі станів.</text:span></text:p>
      <text:p text:style-name="P20"><text:span text:style-name="T5"/></text:p>
      <text:p text:style-name="P23"><text:span text:style-name="T2">2.3 Обґрунтування вибору функціональних елементів</text:span></text:p>
      <text:p text:style-name="P20"><text:span text:style-name="T5">До системи включено лише ті функціональні елементи, які безпосередньо забезпечують автоматичну стабілізацію кута крену і відповідають властивостям квадрокоптера як об’єкта стабілізації:</text:span></text:p>
      <text:p text:style-name="P29"><text:span text:style-name="T2">– задавальний пристрій — формує потрібне значення кута крену; у задачі стабілізації, як правило, задається нульовий кут, що відповідає горизонтальному положенню апарата;</text:span></text:p>
      <text:p text:style-name="P29"><text:span text:style-name="T2">– вузол порівняння — визначає похибку між заданим значенням кута крену та його оціненим значенням; ця похибка є основним сигналом для формування керуючого впливу;</text:span></text:p>
      <text:p text:style-name="P29"><text:span text:style-name="T2">– регулятор системи автоматичної стабілізації — формує керуючий сигнал на основі похибки стабілізації, інтегральної координати та оцінених змінних стану; його використання необхідне через динамічну нестійкість квадрокоптера в каналі крену [10, 11];</text:span></text:p>
      <text:p text:style-name="P29"><text:span text:style-name="T2">– блок насичення — ураховує обмеження виконавчого каналу за допустимим рівнем керуючого впливу; без нього сигнал регулятора може перевищувати фізичні можливості ЕРО, двигунів і гвинтів;</text:span></text:p>
      <text:p text:style-name="P29"><text:span text:style-name="T2">– виконавчий канал — перетворює керуючий сигнал у механічну дію (керуючий момент у каналі крену) і моделюється еквівалентною інерційною ланкою першого порядку [1, 4, 6];</text:span></text:p>
      <text:p text:style-name="P29"><text:soft-page-break/><text:span text:style-name="T2">– об’єкт стабілізації — БПЛА-квадрокоптер у каналі крену; на його вхід подається сумарний момент, на виходах — кут крену та кутова швидкість;</text:span></text:p>
      <text:p text:style-name="P29"><text:span text:style-name="T2">– канал збурень — забезпечує введення зовнішнього збурюючого моменту M_d(t) на корпус квадрокоптера;</text:span></text:p>
      <text:p text:style-name="P29"><text:span text:style-name="T2">– вимірювальний блок — забезпечує отримання сигналів про кут крену та кутову швидкість через датчики (датчик кута крену і гіроскоп);</text:span></text:p>
      <text:p text:style-name="P29"><text:span text:style-name="T2">– блок оцінювання стану на основі фільтра Калмана — формує оцінки φ̂(t), p̂(t), які подаються у зворотний зв’язок замість безпосередньо вимірюваних сигналів і дають змогу зменшити вплив шумів вимірювання [8, 9];</text:span></text:p>
      <text:p text:style-name="P29"><text:span text:style-name="T2">– канал від’ємного зворотного зв’язку — передає оцінки кута крену та кутової швидкості до вузла порівняння і регулятора.</text:span></text:p>
      <text:p text:style-name="P20"><text:span text:style-name="T5">Такий склад елементів є достатнім для розв’язання задачі стабілізації кута крену в обраній постановці. Подальша деталізація виконавчого каналу на чотири окремі ротори здійснена у структурній схемі (підрозділ 3.2).</text:span></text:p>
      <text:p text:style-name="P20"><text:span text:style-name="T5"/></text:p>
      <text:p text:style-name="P22"><text:span text:style-name="T2">3 МАТЕМАТИЧНИЙ ОПИС ОБ’ЄКТА СИСТЕМИ АВТОМАТИЧНОЇ СТАБІЛІЗАЦІЇ КУТА КРЕНУ</text:span></text:p>
      <text:p text:style-name="P23"><text:span text:style-name="T2">3.1 Математична модель об’єкта та елементів системи у просторі станів</text:span></text:p>
      <text:p text:style-name="P20"><text:span text:style-name="T5">Метою цього підрозділу є побудова лінеаризованої математичної моделі каналу крену БПЛА-квадрокоптера, придатної для застосування фільтра Калмана та синтезу регулятора. Оскільки фільтр Калмана за своєю природою працює з моделлю у просторі станів [8, 9, 12], доцільно з самого початку формулювати моделі об’єкта та виконавчого каналу безпосередньо у формі диференціальних рівнянь, не вводячи проміжно передавальних функцій, які надалі не використовуються.</text:span></text:p>
      <text:p text:style-name="P20"><text:span text:style-name="T5">Для побудови моделі прийнято такі припущення: корпус квадрокоптера розглядається як жорстке тверде тіло; центр мас розташований у </text:span><text:soft-page-break/><text:span text:style-name="T5">геометричному центрі рами; досліджуються малі відхилення від положення рівноваги; канал крену розглядається окремо від каналів тангажу та рискання; виконавчий канал у каналі крену описується еквівалентним диференціальним рівнянням першого порядку [1, 4, 6].</text:span></text:p>
      <text:p text:style-name="P20"><text:span text:style-name="T5">У загальному випадку обертальний рух квадрокоптера описується рівняннями Ейлера. Для каналу крену:</text:span></text:p>
      <text:p text:style-name="P26"><text:span text:style-name="T2">J_x · dp/dt + (J_z − J_y) · q · r = M_φ,<text:tab/>(3.1)</text:span></text:p>
      <text:p text:style-name="P2"><text:span text:style-name="T5">де J_x, J_y, J_z — моменти інерції квадрокоптера відносно відповідних осей; p, q, r — кутові швидкості в каналах крену, тангажу та рискання; M_φ — сумарний момент у каналі крену.</text:span></text:p>
      <text:p text:style-name="P20"><text:span text:style-name="T5">Для режиму малих відхилень поблизу зависання добутком q · r можна знехтувати, тоді рівняння (3.1) спрощується до вигляду</text:span></text:p>
      <text:p text:style-name="P26"><text:span text:style-name="T2">J_x · dp/dt = M_φ.<text:tab/>(3.2)</text:span></text:p>
      <text:p text:style-name="P20"><text:span text:style-name="T5">За малих кутів орієнтації приймається</text:span></text:p>
      <text:p text:style-name="P26"><text:span text:style-name="T2">p ≈ dφ/dt,<text:tab/>(3.3)</text:span></text:p>
      <text:p text:style-name="P2"><text:span text:style-name="T5">де φ — кут крену. З урахуванням (3.3) рівняння руху в каналі крену записується як</text:span></text:p>
      <text:p text:style-name="P26"><text:span text:style-name="T2">J_x · d²φ/dt² = M_φ.<text:tab/>(3.4)</text:span></text:p>
      <text:p text:style-name="P20"><text:span text:style-name="T5">Сумарний момент у каналі крену є сумою керуючого та збурюючого моментів:</text:span></text:p>
      <text:p text:style-name="P26"><text:span text:style-name="T2">M_φ(t) = M_u(t) + M_d(t),<text:tab/>(3.5)</text:span></text:p>
      <text:p text:style-name="P2"><text:span text:style-name="T5">де M_u(t) — керуючий момент; M_d(t) — зовнішній збурюючий момент.</text:span></text:p>
      <text:p text:style-name="P20"><text:span text:style-name="T5">Для врахування демпфування рух у каналі крену описується рівнянням</text:span></text:p>
      <text:p text:style-name="P26"><text:span text:style-name="T2">J_x · d²φ/dt² + c_φ · dφ/dt = M_u(t) + M_d(t),<text:tab/>(3.6)</text:span></text:p>
      <text:p text:style-name="P2"><text:span text:style-name="T5">де c_φ — коефіцієнт демпфування в каналі крену.</text:span></text:p>
      <text:p text:style-name="P20"><text:span text:style-name="T5">Фізично керуючий момент у каналі крену формується за рахунок різниці тяг лівої та правої пар двигунів:</text:span></text:p>
      <text:p text:style-name="P26"><text:soft-page-break/><text:span text:style-name="T2">M_u(t) = l_еф · [(T₂(t) + T₃(t)) − (T₁(t) + T₄(t))],<text:tab/>(3.7)</text:span></text:p>
      <text:p text:style-name="P2"><text:span text:style-name="T5">де l_еф — ефективне плече сили; T₁, T₂, T₃, T₄ — тяги відповідних роторів. У межах задачі стабілізації одного каналу зручніше використовувати не окремі тяги роторів, а узагальнений керуючий момент M_u(t) як змінну стану; деталізація на рівні окремих роторів виконується далі у структурній схемі (підрозділ 3.2).</text:span></text:p>
      <text:p text:style-name="P20"><text:span text:style-name="T5">За умови симетричної конфігурації квадрокоптера та однакових динамічних властивостей виконавчих елементів динаміку виконавчого каналу у каналі крену описано еквівалентним диференціальним рівнянням першого порядку:</text:span></text:p>
      <text:p text:style-name="P26"><text:span text:style-name="T2">T_a · dM_u/dt + M_u = k_a · u,<text:tab/>(3.8)</text:span></text:p>
      <text:p text:style-name="P2"><text:span text:style-name="T5">де T_a — стала часу виконавчого каналу; k_a — коефіцієнт підсилення виконавчого каналу; u(t) — узагальнений керуючий сигнал регулятора. Запис (3.8) у формі диференціального рівняння є зручним для безпосереднього переходу до моделі у просторі станів і не потребує введення проміжної передавальної функції.</text:span></text:p>
      <text:p text:style-name="P20"><text:span text:style-name="T5">Як змінні стану обирано:</text:span></text:p>
      <text:p text:style-name="P26"><text:span text:style-name="T2">x₁ = φ, <text:s text:c="3"/>x₂ = dφ/dt = p, <text:s text:c="3"/>x₃ = M_u,<text:tab/>(3.9)</text:span></text:p>
      <text:p text:style-name="P20"><text:span text:style-name="T5">тоді вектор стану</text:span></text:p>
      <text:p text:style-name="P26"><text:span text:style-name="T2">x(t) = [x₁(t), x₂(t), x₃(t)]ᵀ = [φ(t), p(t), M_u(t)]ᵀ.<text:tab/>(3.10)</text:span></text:p>
      <text:p text:style-name="P20"><text:span text:style-name="T5">Підставляючи (3.9) у (3.6), (3.8), отримуємо систему рівнянь стану:</text:span></text:p>
      <text:p text:style-name="P26"><text:span text:style-name="T2">dx₁/dt = x₂,<text:tab/>(3.11)</text:span></text:p>
      <text:p text:style-name="P26"><text:span text:style-name="T2">dx₂/dt = − (c_φ / J_x) · x₂ + (1 / J_x) · x₃ + (1 / J_x) · M_d,<text:tab/>(3.12)</text:span></text:p>
      <text:p text:style-name="P26"><text:span text:style-name="T2">dx₃/dt = − (1 / T_a) · x₃ + (k_a / T_a) · u.<text:tab/>(3.13)</text:span></text:p>
      <text:p text:style-name="P20"><text:span text:style-name="T5">У матричній формі модель об’єкта стабілізації записується у вигляді</text:span></text:p>
      <text:p text:style-name="P26"><text:span text:style-name="T2">dx/dt = A · x + B · u + E · M_d,<text:tab/>(3.14)</text:span></text:p>
      <text:p text:style-name="P2"><text:span text:style-name="T5">де матриці A, B, E мають вигляд:</text:span></text:p>
      <text:p text:style-name="P25"><text:soft-page-break/><text:span text:style-name="T2">A = [[0, 1, 0], [0, −c_φ/J_x, 1/J_x], [0, 0, −1/T_a]],</text:span></text:p>
      <text:p text:style-name="P25"><text:span text:style-name="T2">B = [[0], [0], [k_a/T_a]], <text:s text:c="4"/>E = [[0], [1/J_x], [0]].</text:span></text:p>
      <text:p text:style-name="P20"><text:span text:style-name="T5">Для опису вимірювального каналу прийнято, що вимірюються кут крену та кутова швидкість у каналі крену:</text:span></text:p>
      <text:p text:style-name="P26"><text:span text:style-name="T2">y_φ = φ + n_φ,<text:tab/>(3.15)</text:span></text:p>
      <text:p text:style-name="P26"><text:span text:style-name="T2">y_p = p + n_p,<text:tab/>(3.16)</text:span></text:p>
      <text:p text:style-name="P2"><text:span text:style-name="T5">де n_φ, n_p — шуми вимірювальних каналів. У матричній формі</text:span></text:p>
      <text:p text:style-name="P26"><text:span text:style-name="T2">y = C · x + v,<text:tab/>(3.17)</text:span></text:p>
      <text:p text:style-name="P2"><text:span text:style-name="T5">де y = [y_φ, y_p]ᵀ; v = [n_φ, n_p]ᵀ; матриця спостереження</text:span></text:p>
      <text:p text:style-name="P25"><text:span text:style-name="T2">C = [[1, 0, 0], [0, 1, 0]].</text:span></text:p>
      <text:p text:style-name="P20"><text:span text:style-name="T5">Рівняння (3.14)–(3.17) утворюють лінеаризовану модель об’єкта системи автоматичної стабілізації у просторі станів. Така форма опису є зручною для дискретизації, задання матриць стану, керування, збурення та вимірювання, а також для безпосередньої реалізації алгоритму оцінювання вектора стану на основі фільтра Калмана [8, 9].</text:span></text:p>
      <text:p text:style-name="P20"><text:span text:style-name="T5">Таким чином, у роботі математичні моделі об’єкта стабілізації та виконавчого каналу побудовано безпосередньо у вигляді диференціальних рівнянь і моделі у просторі станів. Передавальні функції не використовуються як базова форма опису, оскільки подальше дослідження передбачає застосування фільтра Калмана. Передавальні функції окремих блоків вводяться далі лише як допоміжний засіб для побудови структурної схеми (підрозділ 3.2) та для аналітичного дослідження стійкості замкненої системи за критерієм Рауса–Гурвіца (підрозділ 4.1) — тобто для тих задач, у яких форма передавальних функцій є природною і безпосередньо використовується.</text:span></text:p>
      <text:p text:style-name="P23"><text:span text:style-name="T2">3.2 Побудова структурної схеми системи автоматичної стабілізації</text:span></text:p>
      <text:p text:style-name="P20"><text:soft-page-break/><text:span text:style-name="T5">Структурна схема системи автоматичної стабілізації призначена для наочного відображення взаємозв’язків між елементами системи, напрямків передавання сигналів, каналу збурення та контуру зворотного зв’язку. На відміну від функціональної схеми, у структурній схемі виконавча частина деталізується на рівні чотирьох окремих роторів, що відповідає фізичній структурі БПЛА-квадрокоптера [1, 4, 6].</text:span></text:p>
      <text:p text:style-name="P20"><text:span text:style-name="T5">Структурна схема будується на основі моделі у просторі станів, отриманої в підрозділі 3.1. Передавальні функції окремих блоків застосовуються як допоміжний засіб структурного подання; основою математичного опису залишається модель у просторі станів.</text:span></text:p>
      <text:p text:style-name="P20"><text:span text:style-name="T5">Виконавча частина подається у вигляді чотирьох паралельних каналів, кожен з яких відповідає одному ротору. Кожен виконавчий канал є системою з одним входом (керуючий сигнал u_i) і одним виходом (тяга T_i ротора). Його еквівалентна передавальна функція має вигляд</text:span></text:p>
      <text:p text:style-name="P26"><text:span text:style-name="T2">W_двi(s) = T_i(s) / U_i(s) = k_a / (T_a · s + 1), <text:s text:c="2"/>i = 1, 2, 3, 4,<text:tab/>(3.18)</text:span></text:p>
      <text:p text:style-name="P2"><text:span text:style-name="T5">що відповідає диференціальному рівнянню (3.8) для виконавчого каналу.</text:span></text:p>
      <text:p text:style-name="P20"><text:span text:style-name="T5">Формування керуючого моменту в каналі крену з тяг окремих роторів є алгебраїчним перетворенням:</text:span></text:p>
      <text:p text:style-name="P26"><text:span text:style-name="T2">M_u(t) = l_еф · [(T₂(t) + T₃(t)) − (T₁(t) + T₄(t))].<text:tab/>(3.19)</text:span></text:p>
      <text:p text:style-name="P20"><text:span text:style-name="T5">Похибка стабілізації формується у вузлі порівняння Σ1:</text:span></text:p>
      <text:p text:style-name="P26"><text:span text:style-name="T2">e(t) = φ_з(t) − φ̂(t),<text:tab/>(3.20)</text:span></text:p>
      <text:p text:style-name="P2"><text:span text:style-name="T5">де φ_з(t) — задане значення кута крену; φ̂(t) — оцінене значення, сформоване фільтром Калмана.</text:span></text:p>
      <text:p text:style-name="P20"><text:span text:style-name="T5">Інтегральна координата z(t) формується через інтегратор</text:span></text:p>
      <text:p text:style-name="P26"><text:span text:style-name="T2">z(t) = ∫ e(τ) dτ,<text:tab/>(3.21)</text:span></text:p>
      <text:p text:style-name="P20"><text:span text:style-name="T5">а керуючий сигнал на виході регулятора визначається співвідношенням</text:span></text:p>
      <text:p text:style-name="P26"><text:span text:style-name="T2">u(t) = k_φ · e(t) + k_z · z(t) − k_p · p̂(t),<text:tab/>(3.22)</text:span></text:p>
      <text:p text:style-name="P2"><text:span text:style-name="T5">де k_φ, k_z, k_p — коефіцієнти регулятора; p̂(t) — оцінена кутова швидкість.</text:span></text:p>
      <text:p text:style-name="P20"><text:soft-page-break/><text:span text:style-name="T5">Блок насичення враховує обмеження виконавчого каналу:</text:span></text:p>
      <text:p text:style-name="P26"><text:span text:style-name="T2">u_sat(t) = sat[u(t)].<text:tab/>(3.23)</text:span></text:p>
      <text:p text:style-name="P20"><text:span text:style-name="T5">Сигнал u_sat(t) надходить на блок розподілу керуючих сигналів, який формує чотири складові u₁(t), u₂(t), u₃(t), u₄(t) для відповідних виконавчих каналів. На виходах виконавчих каналів формуються тяги T_i(t), які в алгебраїчному блоці (3.19) перетворюються у керуючий момент M_u(t).</text:span></text:p>
      <text:p text:style-name="P20"><text:span text:style-name="T5">У суматорі Σ2 до керуючого моменту додається зовнішній збурюючий момент:</text:span></text:p>
      <text:p text:style-name="P26"><text:span text:style-name="T2">M_φ(t) = M_u(t) + M_d(t),<text:tab/>(3.24)</text:span></text:p>
      <text:p text:style-name="P2"><text:span text:style-name="T5">а сумарний момент надходить на вхід об’єкта стабілізації. Об’єкт у структурній схемі відповідає рівнянням (3.6), (3.11)–(3.13) і формує вихідні координати φ(t) і p(t).</text:span></text:p>
      <text:p text:style-name="P20"><text:span text:style-name="T5">У каналі зворотного зв’язку вимірювальні блоки формують сигнали</text:span></text:p>
      <text:p text:style-name="P26"><text:span text:style-name="T2">y_φ(t) = φ(t) + n_φ(t),<text:tab/>(3.25)</text:span></text:p>
      <text:p text:style-name="P26"><text:span text:style-name="T2">y_p(t) = p(t) + n_p(t).<text:tab/>(3.26)</text:span></text:p>
      <text:p text:style-name="P20"><text:span text:style-name="T5">Сигнали y_φ(t), y_p(t) разом із сигналом u_sat(t) надходять до блока оцінювання стану на основі дискретного фільтра Калмана W_ФК(z). Цей блок формує оцінки φ̂(t), p̂(t), які подаються у зворотний зв’язок: φ̂(t) — на від’ємний вхід суматора Σ1, p̂(t) — на регулятор як демпфувальна складова [8, 9].</text:span></text:p>
      <text:p text:style-name="P20"><text:span text:style-name="T5">Побудовану структурну схему системи автоматичної стабілізації подано на рисунку 3.1.</text:span></text:p>
      <text:p text:style-name="P15"><draw:frame draw:style-name="fr4" draw:name="graphics5" text:anchor-type="paragraph" svg:x="0.152cm" svg:y="0.25cm" svg:width="16.127cm" svg:height="23.25cm" draw:z-index="22"><draw:image xlink:href="Pictures/10000201000006F4000009E76A4F3523.png" xlink:type="simple" xlink:show="embed" xlink:actuate="onLoad"/></draw:frame><text:soft-page-break/><text:span text:style-name="T2">Рисунок 3.1 — Структурна схема системи автоматичної стабілізації<text:line-break/>кута крену БПЛА-квадрокоптера</text:span></text:p>
      <text:p text:style-name="P20"><text:soft-page-break/><text:span text:style-name="T5">Зауваження: у структурній схемі блоки W_двi(s) і об’єкт стабілізації W_о,крен(s) наведено для зручності структурного зображення; основою математичного опису залишається модель у просторі станів (3.14)–(3.17), на якій ґрунтується синтез фільтра Калмана.</text:span></text:p>
      <text:p text:style-name="P20"><text:span text:style-name="T5">Отже, структурна схема системи автоматичної стабілізації узгоджується з математичною моделлю, прийнятою в підрозділі 3.1, і деталізує виконавчу частину до рівня чотирьох окремих роторів, що відповідає фізичній структурі квадрокоптера.</text:span></text:p>
      <text:p text:style-name="P23"><text:span text:style-name="T2">3.3 Застосування фільтра Калмана</text:span></text:p>
      <text:p text:style-name="P20"><text:span text:style-name="T5">Якість стабілізації залежить не лише від закону управління, а й від точності оцінювання поточного стану об’єкта. Оскільки сигнали датчиків містять шуми та похибки, безпосереднє використання виміряних значень кута крену і кутової швидкості у зворотному зв’язку погіршує якість стабілізації. Для зменшення впливу цих факторів у роботі використовується дискретний фільтр Калмана [8, 9, 12].</text:span></text:p>
      <text:p text:style-name="P20"><text:span text:style-name="T5">Фільтр Калмана застосовується для оцінювання стану квадрокоптера у каналі крену на основі лінеаризованої моделі у просторі станів, побудованої в підрозділі 3.1. Як вектор стану приймається</text:span></text:p>
      <text:p text:style-name="P26"><text:span text:style-name="T2">x(k) = [φ(k), p(k), M_u(k)]ᵀ,<text:tab/>(3.27)</text:span></text:p>
      <text:p text:style-name="P2"><text:span text:style-name="T5">де φ(k) — кут крену; p(k) — кутова швидкість крену; M_u(k) — керуючий момент виконавчого каналу на дискретному кроці k.</text:span></text:p>
      <text:p text:style-name="P20"><text:span text:style-name="T5">Безперервна модель об’єкта (3.14), (3.17) має вигляд</text:span></text:p>
      <text:p text:style-name="P26"><text:span text:style-name="T2">dx/dt = A · x + B · u + E · M_d,<text:tab/>(3.28)</text:span></text:p>
      <text:p text:style-name="P26"><text:span text:style-name="T2">y = C · x + v.<text:tab/>(3.29)</text:span></text:p>
      <text:p text:style-name="P20"><text:span text:style-name="T5">Оскільки збурюючий момент M_d(t) у загальному випадку не є безпосередньо вимірюваним сигналом, під час синтезу дискретного фільтра Калмана його вплив ураховується у складі шуму процесу. Тому для цифрової реалізації фільтра використовується дискретна модель</text:span></text:p>
      <text:p text:style-name="P26"><text:soft-page-break/><text:span text:style-name="T2">x(k+1) = A_d · x(k) + B_d · u(k) + w(k),<text:tab/>(3.30)</text:span></text:p>
      <text:p text:style-name="P26"><text:span text:style-name="T2">y(k) = C · x(k) + v(k),<text:tab/>(3.31)</text:span></text:p>
      <text:p text:style-name="P2"><text:span text:style-name="T5">де w(k) — шум процесу; v(k) — шум вимірювання.</text:span></text:p>
      <text:p text:style-name="P20"><text:span text:style-name="T5">Шуми процесу та вимірювання характеризуються нульовим середнім і матрицями коваріації Q та R:</text:span></text:p>
      <text:p text:style-name="P26"><text:span text:style-name="T2">E[w(k)] = 0, <text:s text:c="2"/>E[v(k)] = 0,<text:tab/>(3.32)</text:span></text:p>
      <text:p text:style-name="P26"><text:span text:style-name="T2">E[w(k) · wᵀ(k)] = Q, <text:s text:c="2"/>E[v(k) · vᵀ(k)] = R.<text:tab/>(3.33)</text:span></text:p>
      <text:p text:style-name="P20"><text:span text:style-name="T5">За малого періоду дискретизації T₀ дискретні матриці моделі подано у вигляді (метод Ейлера першого порядку):</text:span></text:p>
      <text:p text:style-name="P26"><text:span text:style-name="T2">A_d ≈ I + A · T₀,<text:tab/>(3.34)</text:span></text:p>
      <text:p text:style-name="P26"><text:span text:style-name="T2">B_d ≈ B · T₀.<text:tab/>(3.35)</text:span></text:p>
      <text:p text:style-name="P20"><text:span text:style-name="T5">Вектор вимірювань і вектор шумів вимірювання мають вигляд</text:span></text:p>
      <text:p text:style-name="P26"><text:span text:style-name="T2">y(k) = [y_φ(k), y_p(k)]ᵀ, <text:s text:c="2"/>v(k) = [n_φ(k), n_p(k)]ᵀ,<text:tab/>(3.36)</text:span></text:p>
      <text:p text:style-name="P2"><text:span text:style-name="T5">а матриця вимірювання — як у (3.17).</text:span></text:p>
      <text:p text:style-name="P20"><text:span text:style-name="T5">Алгоритм дискретного фільтра Калмана включає два етапи — прогнозування і корекцію.</text:span></text:p>
      <text:p text:style-name="P20"><text:span text:style-name="T5">Етап прогнозування. Прогноз стану та матриці коваріації похибки:</text:span></text:p>
      <text:p text:style-name="P26"><text:span text:style-name="T2">x̂(k|k−1) = A_d · x̂(k−1|k−1) + B_d · u(k−1),<text:tab/>(3.37)</text:span></text:p>
      <text:p text:style-name="P26"><text:span text:style-name="T2">P(k|k−1) = A_d · P(k−1|k−1) · A_dᵀ + Q.<text:tab/>(3.38)</text:span></text:p>
      <text:p text:style-name="P20"><text:span text:style-name="T5">Етап корекції. Матриця підсилення Калмана:</text:span></text:p>
      <text:p text:style-name="P26"><text:span text:style-name="T2">K(k) = P(k|k−1) · Cᵀ · [C · P(k|k−1) · Cᵀ + R]⁻¹.<text:tab/>(3.39)</text:span></text:p>
      <text:p text:style-name="P20"><text:span text:style-name="T5">Інновація — різниця між реальними вимірюваннями та їх прогнозом:</text:span></text:p>
      <text:p text:style-name="P26"><text:span text:style-name="T2">r(k) = y(k) − C · x̂(k|k−1).<text:tab/>(3.40)</text:span></text:p>
      <text:p text:style-name="P20"><text:span text:style-name="T5">Уточнення оцінки стану та оновлення матриці коваріації:</text:span></text:p>
      <text:p text:style-name="P26"><text:span text:style-name="T2">x̂(k|k) = x̂(k|k−1) + K(k) · r(k),<text:tab/>(3.41)</text:span></text:p>
      <text:p text:style-name="P26"><text:soft-page-break/><text:span text:style-name="T2">P(k|k) = [I − K(k) · C] · P(k|k−1).<text:tab/>(3.42)</text:span></text:p>
      <text:p text:style-name="P20"><text:span text:style-name="T5">У результаті на кожному кроці формуються оцінки φ̂(k), p̂(k), M̂_u(k), які використовуються для побудови більш точного зворотного зв’язку в системі автоматичної стабілізації [8, 9].</text:span></text:p>
      <text:p text:style-name="P20"><text:span text:style-name="T5">Алгоритм дискретного фільтра Калмана зображено на рисунку 3.2.</text:span></text:p>
      <text:p text:style-name="P28"/>
      <text:p text:style-name="P15"><draw:frame draw:style-name="fr4" draw:name="graphics6" text:anchor-type="paragraph" svg:x="0.164cm" svg:y="0.323cm" svg:width="16.171cm" svg:height="20.413cm" draw:z-index="23"><draw:image xlink:href="Pictures/10000201000005CD0000078FC0EE237B.png" xlink:type="simple" xlink:show="embed" xlink:actuate="onLoad"/></draw:frame><text:soft-page-break/><text:span text:style-name="T2">Рисунок 3.2 — Структурна схема алгоритму оцінювання стану<text:line-break/>на основі дискретного фільтра Калмана</text:span></text:p>
      <text:p text:style-name="P20"><text:span text:style-name="T5">Практичне значення фільтра Калмана полягає в тому, що він зменшує вплив шумів вимірювання, підвищує точність оцінювання кута крену та </text:span><text:soft-page-break/><text:span text:style-name="T5">кутової швидкості і покращує якість зворотного зв’язку в системі стабілізації [8, 9, 12].</text:span></text:p>
      <text:p text:style-name="P20"><text:span text:style-name="T5"/></text:p>
      <text:p text:style-name="P23"><text:span text:style-name="T2">3.4 Моделювання динаміки системи автоматичної стабілізації при заданих початкових умовах і зовнішніх впливах</text:span></text:p>
      <text:p text:style-name="P20"><text:span text:style-name="T5">Метою моделювання на цьому етапі є перевірка реакції системи на типові початкові відхилення та зовнішні збурення. У підрозділі 3.4 досліджується спрощена замкнена структура без інтегральної складової і anti-windup-корекції — для отримання базової динаміки; повний регулятор з ПІ-структурою та anti-windup-корекцією аналізується в розділі 4.</text:span></text:p>
      <text:p text:style-name="P20"><text:span text:style-name="T5">Моделювання виконується для каналу крену БПЛА-квадрокоптера Х-подібної схеми на основі лінеаризованої моделі у просторі станів (3.14)–(3.17), моделі виконавчого каналу (3.8), вимірювального блока (3.15)–(3.16) і блока оцінювання стану на основі дискретного фільтра Калмана (3.37)–(3.42) [1, 4, 6, 8, 9].</text:span></text:p>
      <text:p text:style-name="P20"><text:span text:style-name="T5">Загальна модель об’єкта у просторі станів зберігає вигляд (3.14), (3.17). Для базового аналізу динаміки на цьому етапі застосовується спрощений закон стабілізації</text:span></text:p>
      <text:p text:style-name="P26"><text:span text:style-name="T2">u(t) = k_φ · [φ_з(t) − φ̂(t)] − k_p · p̂(t),<text:tab/>(3.43)</text:span></text:p>
      <text:p text:style-name="P2"><text:span text:style-name="T5">де k_φ, k_p — коефіцієнти підсилення; φ̂(t), p̂(t) — оцінки кута крену та кутової швидкості.</text:span></text:p>
      <text:p text:style-name="P20"><text:span text:style-name="T5">Похибка стабілізації</text:span></text:p>
      <text:p text:style-name="P26"><text:span text:style-name="T2">e(t) = φ_з(t) − φ̂(t).<text:tab/>(3.44)</text:span></text:p>
      <text:p text:style-name="P20"><text:span text:style-name="T5">Замкнена модель системи автоматичної стабілізації описується співвідношенням</text:span></text:p>
      <text:p text:style-name="P26"><text:span text:style-name="T2">dx/dt = A · x + B · {k_φ · [φ_з(t) − φ̂(t)] − k_p · p̂(t)} + E · M_d(t).<text:tab/>(3.45)</text:span></text:p>
      <text:p text:style-name="P20"><text:span text:style-name="T5">Початкові умови задаються вектором</text:span></text:p>
      <text:p text:style-name="P26"><text:span text:style-name="T2">x(0) = [φ(0), p(0), M_u(0)]ᵀ.<text:tab/>(3.46)</text:span></text:p>
      <text:p text:style-name="P20"><text:soft-page-break/><text:span text:style-name="T5">Під час моделювання розглядаються такі типові режими.</text:span></text:p>
      <text:p text:style-name="P20"><text:span text:style-name="T5">Режим 1 — реакція на початкове відхилення кута крену без зовнішнього збурення:</text:span></text:p>
      <text:p text:style-name="P26"><text:span text:style-name="T2">φ(0) = φ₀, <text:s text:c="2"/>p(0) = 0, <text:s text:c="2"/>M_d(t) = 0.<text:tab/>(3.47)</text:span></text:p>
      <text:p text:style-name="P20"><text:span text:style-name="T5">Режим 2 — реакція на початкову кутову швидкість:</text:span></text:p>
      <text:p text:style-name="P26"><text:span text:style-name="T2">φ(0) = 0, <text:s text:c="2"/>p(0) = p₀, <text:s text:c="2"/>M_d(t) = 0.<text:tab/>(3.48)</text:span></text:p>
      <text:p text:style-name="P20"><text:span text:style-name="T5">Режим 3 — ступінчасте зовнішнє збурення:</text:span></text:p>
      <text:p text:style-name="P26"><text:span text:style-name="T2">M_d(t) = M₀ · 1(t),<text:tab/>(3.49)</text:span></text:p>
      <text:p text:style-name="P2"><text:span text:style-name="T5">де M₀ — амплітуда збурюючого моменту; 1(t) — одинична функція Хевісайда.</text:span></text:p>
      <text:p text:style-name="P20"><text:span text:style-name="T5">Режим 4 — короткочасне (експоненціально затухаюче) збурення:</text:span></text:p>
      <text:p text:style-name="P26"><text:span text:style-name="T2">M_d(t) = M₀ · exp(−α · t),<text:tab/>(3.50)</text:span></text:p>
      <text:p text:style-name="P2"><text:span text:style-name="T5">де α — коефіцієнт затухання.</text:span></text:p>
      <text:p text:style-name="P20"><text:span text:style-name="T5">Режим 5 — гармонічне збурення:</text:span></text:p>
      <text:p text:style-name="P26"><text:span text:style-name="T2">M_d(t) = M_a · sin(ω_d · t),<text:tab/>(3.51)</text:span></text:p>
      <text:p text:style-name="P2"><text:span text:style-name="T5">де M_a — амплітуда гармонічного збурення; ω_d — кутова частота.</text:span></text:p>
      <text:p text:style-name="P20"><text:span text:style-name="T5">Під час моделювання також враховуються шуми вимірювальних каналів n_φ(t), n_p(t); за наявності фільтра Калмана в контурі зворотного зв’язку використовуються не безпосередньо виміряні сигнали, а оцінки стану φ̂(t), p̂(t), що дозволяє зменшити вплив шумів вимірювання [8, 9].</text:span></text:p>
      <text:p text:style-name="P20"><text:span text:style-name="T5">Для оцінювання якості системи аналізуються часові залежності φ(t), p(t), M_u(t), u(t), φ̂(t), p̂(t), e(t). Основними показниками якості є час стабілізації, максимальне відхилення кута крену, статична похибка та максимальне значення керуючого сигналу [10, 11].</text:span></text:p>
      <text:p text:style-name="P20"><text:span text:style-name="T5">Час стабілізації визначається умовою</text:span></text:p>
      <text:p text:style-name="P26"><text:span text:style-name="T2">|φ(t) − φ_з(t)| ≤ Δ <text:s text:c="2"/>при <text:s text:c="2"/>t ≥ t_ст,<text:tab/>(3.52)</text:span></text:p>
      <text:p text:style-name="P2"><text:span text:style-name="T5">де Δ — задана смуга точності; t_ст — час стабілізації.</text:span></text:p>
      <text:p text:style-name="P20"><text:soft-page-break/><text:span text:style-name="T5">Статична похибка визначається співвідношенням</text:span></text:p>
      <text:p text:style-name="P26"><text:span text:style-name="T2">e_ст = lim(t → ∞) [φ_з(t) − φ(t)].<text:tab/>(3.53)</text:span></text:p>
      <text:p text:style-name="P20"><text:span text:style-name="T5">Таким чином, прийнята математична постановка задачі моделювання базується на замкненій моделі у просторі станів, спрощеному законі стабілізації, моделі збурень і блоці оцінювання стану. Отримані результати служать основою для переходу до повного регулятора (розділ 4) та фінального аналізу результатів (розділ 5).</text:span></text:p>
      <text:p text:style-name="P20"><text:span text:style-name="T5"/></text:p>
      <text:p text:style-name="P22"><text:span text:style-name="T2">4 ФОРМУВАННЯ РЕГУЛЯТОРА СИСТЕМИ АВТОМАТИЧНОЇ СТАБІЛІЗАЦІЇ КУТА КРЕНУ</text:span></text:p>
      <text:p text:style-name="P23"><text:span text:style-name="T2">4.1 Синтез закону стабілізації</text:span></text:p>
      <text:p text:style-name="P20"><text:span text:style-name="T5">Закон стабілізації — це сукупність співвідношень, які забезпечують формування керуючого сигналу на основі заданого значення кута крену, оціненого поточного стану об’єкта та вимог до якості перехідного процесу. Оскільки в підрозділі 3.1 математичну модель об’єкта стабілізації побудовано безпосередньо у просторі станів, синтез регулятора виконується з урахуванням змінних стану. Передавальні функції в цьому підрозділі використовуються лише як допоміжний засіб для аналітичного дослідження стійкості та отримання характеристичного рівняння лінеаризованої замкненої системи [10, 11].</text:span></text:p>
      <text:p text:style-name="P20"><text:span text:style-name="T5">Синтез закону стабілізації виконується з урахуванням вимог до точності, швидкодії та демпфування коливань у каналі крену. Основним сигналом для регулятора є похибка стабілізації за кутом крену:</text:span></text:p>
      <text:p text:style-name="P26"><text:span text:style-name="T2">e(t) = φ_з(t) − φ̂(t),<text:tab/>(4.1)</text:span></text:p>
      <text:p text:style-name="P2"><text:span text:style-name="T5">де φ_з(t) — задане значення кута крену; φ̂(t) — оцінене значення, сформоване фільтром Калмана.</text:span></text:p>
      <text:p text:style-name="P20"><text:span text:style-name="T5">Для зменшення статичної похибки до структури регулятора вводиться інтегральна координата</text:span></text:p>
      <text:p text:style-name="P26"><text:soft-page-break/><text:span text:style-name="T2">dz(t)/dt = e(t),<text:tab/>(4.2)</text:span></text:p>
      <text:p text:style-name="P2"><text:span text:style-name="T5">де z(t) — інтеграл від похибки стабілізації.</text:span></text:p>
      <text:p text:style-name="P20"><text:span text:style-name="T5">Для підвищення демпфування використовується від’ємний зворотний зв’язок за оціненою кутовою швидкістю. Закон стабілізації набуває вигляду</text:span></text:p>
      <text:p text:style-name="P26"><text:span text:style-name="T2">u(t) = k_φ · e(t) + k_z · z(t) − k_p · p̂(t),<text:tab/>(4.3)</text:span></text:p>
      <text:p text:style-name="P2"><text:span text:style-name="T5">де k_φ — коефіцієнт підсилення за кутом крену; k_z — коефіцієнт інтегральної складової; k_p — коефіцієнт зворотного зв’язку за кутовою швидкістю; p̂(t) — оцінена кутова швидкість.</text:span></text:p>
      <text:p text:style-name="P20"><text:span text:style-name="T5">Рівняння (4.3) відповідає ПІ-регулятору з додатковим демпфувальним зворотним зв’язком за оціненою кутовою швидкістю. Така структура узгоджується з функціональною схемою (підрозділ 2.2) та структурною схемою (підрозділ 3.2).</text:span></text:p>
      <text:p text:style-name="P20"><text:span text:style-name="T5">Для аналітичного дослідження стійкості замкненої системи використовується спрощена лінеаризована модель. Приймається, що блок оцінювання стану працює достатньо швидко порівняно з основною динамікою каналу крену:</text:span></text:p>
      <text:p text:style-name="P26"><text:span text:style-name="T2">φ̂(t) ≈ φ(t), <text:s text:c="2"/>p̂(t) ≈ p(t),<text:tab/>(4.4)</text:span></text:p>
      <text:p text:style-name="P20"><text:span text:style-name="T5">і у режимі стабілізації поблизу сталої команди</text:span></text:p>
      <text:p text:style-name="P26"><text:span text:style-name="T2">dφ_з(t)/dt ≈ 0.<text:tab/>(4.5)</text:span></text:p>
      <text:p text:style-name="P20"><text:span text:style-name="T5">За цих припущень p̂(t) ≈ dφ(t)/dt ≈ −de(t)/dt, тому закон стабілізації (4.3) може бути поданий у вигляді еквівалентного ПІД-подібного регулятора з передавальною функцією</text:span></text:p>
      <text:p text:style-name="P26"><text:span text:style-name="T2">W_р(s) = k_φ + k_z / s + k_p · s.<text:tab/>(4.6)</text:span></text:p>
      <text:p text:style-name="P20"><text:span text:style-name="T5">Виконавчий канал у лінеаризованому вигляді описується передавальною функцією першого порядку (відповідник рівняння (3.8))</text:span></text:p>
      <text:p text:style-name="P26"><text:span text:style-name="T2">W_вик(s) = k_a / (T_a · s + 1),<text:tab/>(4.7)</text:span></text:p>
      <text:p text:style-name="P2"><text:soft-page-break/><text:span text:style-name="T5">а об’єкт стабілізації у каналі крену — передавальною функцією за кутом крену</text:span></text:p>
      <text:p text:style-name="P26"><text:span text:style-name="T2">W_о,φ(s) = 1 / (J_x · s² + c_φ · s).<text:tab/>(4.8)</text:span></text:p>
      <text:p text:style-name="P20"><text:span text:style-name="T5">Еквівалентна передавальна функція розімкненої лінеаризованої системи</text:span></text:p>
      <text:p text:style-name="P26"><text:span text:style-name="T2">W₀(s) = W_р(s) · W_вик(s) · W_о,φ(s).<text:tab/>(4.9)</text:span></text:p>
      <text:p text:style-name="P20"><text:span text:style-name="T5">Після підстановки</text:span></text:p>
      <text:p text:style-name="P26"><text:span text:style-name="T2">W₀(s) = [(k_φ + k_z/s + k_p · s) · k_a] / [(T_a · s + 1) · (J_x · s² + c_φ · s)].<text:tab/>(4.10)</text:span></text:p>
      <text:p text:style-name="P20"><text:span text:style-name="T5">Характеристичне рівняння замкненої лінеаризованої системи</text:span></text:p>
      <text:p text:style-name="P26"><text:span text:style-name="T2">1 + W₀(s) = 0.<text:tab/>(4.11)</text:span></text:p>
      <text:p text:style-name="P20"><text:span text:style-name="T5">Після приведення до поліноміальної форми</text:span></text:p>
      <text:p text:style-name="P26"><text:span text:style-name="T2">T_a · J_x · s⁴ + (J_x + T_a · c_φ) · s³ + (c_φ + k_a · k_p) · s² + k_a · k_φ · s + k_a · k_z = 0.<text:tab/>(4.12)</text:span></text:p>
      <text:p text:style-name="P20"><text:span text:style-name="T5">Для забезпечення стійкості лінеаризованої ненасиченої системи необхідно, щоб усі коефіцієнти характеристичного полінома були додатними [10, 11]:</text:span></text:p>
      <text:p text:style-name="P26"><text:span text:style-name="T2">T_a &gt; 0, <text:s/>J_x &gt; 0, <text:s/>c_φ &gt; 0, <text:s/>k_a &gt; 0, <text:s/>k_p &gt; 0, <text:s/>k_φ &gt; 0, <text:s/>k_z &gt; 0.<text:tab/>(4.13)</text:span></text:p>
      <text:p text:style-name="P20"><text:span text:style-name="T5">Згідно з критерієм Рауса–Гурвіца для полінома четвертого порядку мають виконуватися умови</text:span></text:p>
      <text:p text:style-name="P26"><text:span text:style-name="T2">(J_x + T_a · c_φ) · (c_φ + k_a · k_p) &gt; T_a · J_x · k_a · k_φ,<text:tab/>(4.14)</text:span></text:p>
      <text:p text:style-name="P26"><text:span text:style-name="T2">[(J_x + T_a · c_φ) · (c_φ + k_a · k_p) − T_a · J_x · k_a · k_φ] · k_a · k_φ &gt; (J_x + T_a · c_φ)² · k_a · k_z.<text:tab/>(4.15)</text:span></text:p>
      <text:p text:style-name="P20"><text:span text:style-name="T5">Співвідношення (4.13)–(4.15) визначають область допустимих значень параметрів регулятора для лінеаризованої моделі без урахування насичення.</text:span></text:p>
      <text:p text:style-name="P20"><text:span text:style-name="T5">У реальній системі керуючий сигнал обмежується за амплітудою, тому до структури регулятора вводиться блок насичення</text:span></text:p>
      <text:p text:style-name="P26"><text:soft-page-break/><text:span text:style-name="T2">u_sat(t) = sat[u(t)],<text:tab/>(4.16)</text:span></text:p>
      <text:p text:style-name="P2"><text:span text:style-name="T5">причому u_sat(t) = u_max при u(t) &gt; u_max; u_sat(t) = u(t) при |u(t)| ≤ u_max; u_sat(t) = −u_max при u(t) &lt; −u_max.</text:span></text:p>
      <text:p text:style-name="P20"><text:span text:style-name="T5">Для запобігання надмірному накопиченню інтегральної складової під час насичення використовується anti-windup-корекція</text:span></text:p>
      <text:p text:style-name="P26"><text:span text:style-name="T2">dz(t)/dt = e(t) + k_aw · [u_sat(t) − u(t)],<text:tab/>(4.17)</text:span></text:p>
      <text:p text:style-name="P2"><text:span text:style-name="T5">де k_aw — коефіцієнт anti-windup-корекції.</text:span></text:p>
      <text:p text:style-name="P20"><text:span text:style-name="T5">Остаточний алгоритм формування керуючого сигналу:</text:span></text:p>
      <text:p text:style-name="P26"><text:span text:style-name="T2">e(t) = φ_з(t) − φ̂(t),<text:tab/>(4.18)</text:span></text:p>
      <text:p text:style-name="P26"><text:span text:style-name="T2">u(t) = k_φ · e(t) + k_z · z(t) − k_p · p̂(t),<text:tab/>(4.19)</text:span></text:p>
      <text:p text:style-name="P26"><text:span text:style-name="T2">u_sat(t) = sat[u(t)],<text:tab/>(4.20)</text:span></text:p>
      <text:p text:style-name="P26"><text:span text:style-name="T2">dz(t)/dt = e(t) + k_aw · [u_sat(t) − u(t)].<text:tab/>(4.21)</text:span></text:p>
      <text:p text:style-name="P20"><text:span text:style-name="T5">Таким чином, синтезований регулятор є ПІ-регулятором з додатковим від’ємним зворотним зв’язком за оціненою кутовою швидкістю та anti-windup-корекцією. Така структура узгоджується з моделлю у просторі станів (3.14)–(3.17), структурною схемою системи автоматичної стабілізації та алгоритмом оцінювання стану на основі фільтра Калмана. Це створює основу для подальшого моделювання замкненої системи в умовах дії збурень і обмежень виконавчого каналу.</text:span></text:p>
      <text:p text:style-name="P20"><text:span text:style-name="T5"/></text:p>
      <text:p text:style-name="P23"><text:span text:style-name="T2">4.2 Моделювання динаміки замкненої системи автоматичної стабілізації при заданих початкових умовах і зовнішніх впливах</text:span></text:p>
      <text:p text:style-name="P20"><text:span text:style-name="T5">У цьому підрозділі досліджується повна замкнена система автоматичної стабілізації з регулятором (4.18)–(4.21), насиченням виконавчого каналу, anti-windup-корекцією та блоком оцінювання стану на основі фільтра Калмана. Моделювання виконується безпосередньо на основі системи диференціальних рівнянь.</text:span></text:p>
      <text:p text:style-name="P20"><text:soft-page-break/><text:span text:style-name="T5">Похибка стабілізації</text:span></text:p>
      <text:p text:style-name="P26"><text:span text:style-name="T2">e(t) = φ_з(t) − φ̂(t).<text:tab/>(4.22)</text:span></text:p>
      <text:p text:style-name="P20"><text:span text:style-name="T5">Інтегральна координата регулятора з anti-windup-корекцією</text:span></text:p>
      <text:p text:style-name="P26"><text:span text:style-name="T2">dz(t)/dt = e(t) + k_aw · [u_sat(t) − u(t)].<text:tab/>(4.23)</text:span></text:p>
      <text:p text:style-name="P20"><text:span text:style-name="T5">Закон стабілізації</text:span></text:p>
      <text:p text:style-name="P26"><text:span text:style-name="T2">u(t) = k_φ · e(t) + k_z · z(t) − k_p · p̂(t).<text:tab/>(4.24)</text:span></text:p>
      <text:p text:style-name="P20"><text:span text:style-name="T5">Сигнал на виконавчий канал з урахуванням насичення</text:span></text:p>
      <text:p text:style-name="P26"><text:span text:style-name="T2">u_sat(t) = sat[u(t)].<text:tab/>(4.25)</text:span></text:p>
      <text:p text:style-name="P20"><text:span text:style-name="T5">Динаміка виконавчого каналу описується рівнянням першого порядку (3.8)</text:span></text:p>
      <text:p text:style-name="P26"><text:span text:style-name="T2">T_a · dM_u(t)/dt + M_u(t) = k_a · u_sat(t).<text:tab/>(4.26)</text:span></text:p>
      <text:p text:style-name="P20"><text:span text:style-name="T5">Рух об’єкта стабілізації в каналі крену описується рівнянням (3.6)</text:span></text:p>
      <text:p text:style-name="P26"><text:span text:style-name="T2">J_x · d²φ(t)/dt² + c_φ · dφ(t)/dt = M_u(t) + M_d(t).<text:tab/>(4.27)</text:span></text:p>
      <text:p text:style-name="P20"><text:span text:style-name="T5">Замкнена система автоматичної стабілізації описується системою диференціальних рівнянь стану:</text:span></text:p>
      <text:p text:style-name="P26"><text:span text:style-name="T2">dφ(t)/dt = p(t),<text:tab/>(4.28)</text:span></text:p>
      <text:p text:style-name="P26"><text:span text:style-name="T2">dp(t)/dt = − (c_φ / J_x) · p(t) + (1 / J_x) · M_u(t) + (1 / J_x) · M_d(t),<text:tab/>(4.29)</text:span></text:p>
      <text:p text:style-name="P26"><text:span text:style-name="T2">dM_u(t)/dt = − (1 / T_a) · M_u(t) + (k_a / T_a) · u_sat(t),<text:tab/>(4.30)</text:span></text:p>
      <text:p text:style-name="P26"><text:span text:style-name="T2">dz(t)/dt = e(t) + k_aw · [u_sat(t) − u(t)].<text:tab/>(4.31)</text:span></text:p>
      <text:p text:style-name="P20"><text:span text:style-name="T5">Вектор стану замкненої безперервної частини системи</text:span></text:p>
      <text:p text:style-name="P26"><text:span text:style-name="T2">x_cl(t) = [φ(t), p(t), M_u(t), z(t)]ᵀ.<text:tab/>(4.32)</text:span></text:p>
      <text:p text:style-name="P20"><text:span text:style-name="T5">Для оцінювання стану використовуються вимірювальні сигнали (3.15)–(3.16); оцінки φ̂(t), p̂(t), M̂_u(t) формуються дискретним фільтром Калмана за алгоритмом (3.37)–(3.42). У чисельному моделюванні безперервна частина </text:span><text:soft-page-break/><text:span text:style-name="T5">системи інтегрується в часі, а блок оцінювання стану оновлюється дискретно з періодом T₀ [8, 9].</text:span></text:p>
      <text:p text:style-name="P20"><text:span text:style-name="T5">Початковий стан замкненої системи</text:span></text:p>
      <text:p text:style-name="P26"><text:span text:style-name="T2">x_cl(0) = [φ(0), p(0), M_u(0), z(0)]ᵀ.<text:tab/>(4.33)</text:span></text:p>
      <text:p text:style-name="P20"><text:span text:style-name="T5">Початкові оцінки стану</text:span></text:p>
      <text:p text:style-name="P26"><text:span text:style-name="T2">x̂(0) = [φ̂(0), p̂(0), M̂_u(0)]ᵀ.<text:tab/>(4.34)</text:span></text:p>
      <text:p text:style-name="P20"><text:span text:style-name="T5">Для дослідження динаміки замкненої системи розглядаються типові режими:</text:span></text:p>
      <text:p text:style-name="P20"><text:span text:style-name="T2">1. початкове відхилення кута крену без зовнішнього збурення:</text:span></text:p>
      <text:p text:style-name="P26"><text:span text:style-name="T2">φ(0) = φ₀, <text:s text:c="2"/>p(0) = 0, <text:s text:c="2"/>M_u(0) = 0, <text:s text:c="2"/>z(0) = 0, <text:s text:c="2"/>M_d(t) = 0;<text:tab/>(4.35)</text:span></text:p>
      <text:p text:style-name="P20"><text:span text:style-name="T2">2. початкова кутова швидкість без зовнішнього збурення:</text:span></text:p>
      <text:p text:style-name="P26"><text:span text:style-name="T2">φ(0) = 0, <text:s text:c="2"/>p(0) = p₀, <text:s text:c="2"/>M_u(0) = 0, <text:s text:c="2"/>z(0) = 0, <text:s text:c="2"/>M_d(t) = 0;<text:tab/>(4.36)</text:span></text:p>
      <text:p text:style-name="P20"><text:span text:style-name="T2">3. ступінчасте зовнішнє збурення:</text:span></text:p>
      <text:p text:style-name="P26"><text:span text:style-name="T2">M_d(t) = M₀ · 1(t);<text:tab/>(4.37)</text:span></text:p>
      <text:p text:style-name="P20"><text:span text:style-name="T2">4. експоненціально затухаюче збурення:</text:span></text:p>
      <text:p text:style-name="P26"><text:span text:style-name="T2">M_d(t) = M₀ · exp(−α · t);<text:tab/>(4.38)</text:span></text:p>
      <text:p text:style-name="P20"><text:span text:style-name="T2">5. гармонічне збурення:</text:span></text:p>
      <text:p text:style-name="P26"><text:span text:style-name="T2">M_d(t) = M_a · sin(ω_d · t).<text:tab/>(4.39)</text:span></text:p>
      <text:p text:style-name="P20"><text:span text:style-name="T5">У процесі моделювання аналізуються часові залежності</text:span></text:p>
      <text:p text:style-name="P26"><text:span text:style-name="T2">φ(t), p(t), M_u(t), u(t), u_sat(t), φ̂(t), p̂(t), e(t).<text:tab/>(4.40)</text:span></text:p>
      <text:p text:style-name="P20"><text:span text:style-name="T5">Основними показниками якості є час стабілізації, максимальне відхилення кута крену, статична похибка, максимальні значення керуючого сигналу та керуючого моменту, а також похибки оцінювання стану [10, 11].</text:span></text:p>
      <text:p text:style-name="P20"><text:span text:style-name="T5">Час стабілізації</text:span></text:p>
      <text:p text:style-name="P26"><text:span text:style-name="T2">|φ(t) − φ_з| ≤ Δ <text:s text:c="2"/>при <text:s text:c="2"/>t ≥ t_ст.<text:tab/>(4.41)</text:span></text:p>
      <text:p text:style-name="P20"><text:span text:style-name="T5">Максимальне відхилення кута крену</text:span></text:p>
      <text:p text:style-name="P26"><text:soft-page-break/><text:span text:style-name="T2">φ_max = max |φ(t)|.<text:tab/>(4.42)</text:span></text:p>
      <text:p text:style-name="P20"><text:span text:style-name="T5">Статична похибка</text:span></text:p>
      <text:p text:style-name="P26"><text:span text:style-name="T2">e_ст = lim(t → ∞) [φ_з − φ(t)].<text:tab/>(4.43)</text:span></text:p>
      <text:p text:style-name="P20"><text:span text:style-name="T5">Максимальні значення керуючого сигналу та керуючого моменту</text:span></text:p>
      <text:p text:style-name="P26"><text:span text:style-name="T2">u_sat,max = max |u_sat(t)|,<text:tab/>(4.44)</text:span></text:p>
      <text:p text:style-name="P26"><text:span text:style-name="T2">M_u,max = max |M_u(t)|.<text:tab/>(4.45)</text:span></text:p>
      <text:p text:style-name="P20"><text:span text:style-name="T5">Для оцінки впливу anti-windup-корекції використовується різниця</text:span></text:p>
      <text:p text:style-name="P26"><text:span text:style-name="T2">Δu_aw(t) = u(t) − u_sat(t).<text:tab/>(4.46)</text:span></text:p>
      <text:p text:style-name="P20"><text:span text:style-name="T5">Точність оцінювання стану характеризується похибками</text:span></text:p>
      <text:p text:style-name="P26"><text:span text:style-name="T2">e_φ,оц(t) = φ(t) − φ̂(t),<text:tab/>(4.47)</text:span></text:p>
      <text:p text:style-name="P26"><text:span text:style-name="T2">e_p,оц(t) = p(t) − p̂(t).<text:tab/>(4.48)</text:span></text:p>
      <text:p text:style-name="P20"><text:span text:style-name="T5">Таким чином, прийнята математична постановка задачі моделювання дозволяє дослідити вплив початкових умов, зовнішніх збурень, шумів вимірювання, насичення виконавчого каналу та anti-windup-корекції на якість стабілізації кута крену. Отримані часові залежності та числові показники використовуються в наступному розділі для аналізу ефективності синтезованого регулятора та оцінювання працездатності системи автоматичної стабілізації.</text:span></text:p>
      <text:p text:style-name="P20"><text:span text:style-name="T5"/></text:p>
      <text:p text:style-name="P21"><text:span text:style-name="T8">5 АНАЛІЗ РЕЗУЛЬТАТІВ МОДЕЛЮВАННЯ</text:span></text:p>
      <text:p text:style-name="P20"><text:span text:style-name="T5">У розділі наведено аналіз результатів моделювання замкненої системи автоматичної стабілізації кута крену БПЛА-квадрокоптера із синтезованим регулятором та фільтром Калмана. Дослідження виконано для п’яти типових режимів: початкове відхилення кута крену; початкова кутова швидкість; ступінчасте збурення; короткочасне збурення типу пориву вітру; періодичне збурення [10, 11].</text:span></text:p>
      <text:p text:style-name="P20"><text:soft-page-break/><text:span text:style-name="T5">Для оцінювання роботи системи аналізувалися часові залежності кута крену φ(t), кутової швидкості p(t), керуючого сигналу u(t), керуючого моменту M_u(t), а також оцінених значень φ̂(t) і p̂(t). Показниками якості є час стабілізації, максимальне відхилення кута крену, статична похибка та рівень керуючого сигналу.</text:span></text:p>
      <text:p text:style-name="P20"><text:span text:style-name="T5">Режим 1 — початкове відхилення кута крену. Результати моделювання наведено на рисунку 5.1. Система забезпечує повернення кута крену до заданого значення; перехідний процес має згасний характер, що свідчить про стійкість замкненої системи автоматичної стабілізації.</text:span></text:p>
      <text:p text:style-name="P28"><draw:frame draw:style-name="fr1" text:anchor-type="as-char" svg:width="15cm" svg:height="9.807cm" draw:z-index="9"><draw:image xlink:href="Pictures/10000000000007EF0000053088356E81.png" xlink:type="simple" xlink:show="embed" xlink:actuate="onLoad"/></draw:frame></text:p>
      <text:p text:style-name="P15"><text:span text:style-name="T2">Рисунок 5.1 — Перехідні процеси замкненої системи у режимі початкового відхилення кута крену</text:span></text:p>
      <text:p text:style-name="P20"><text:span text:style-name="T5">Кутова швидкість на початку процесу має найбільше за модулем значення, після чого згасає. Керуючий сигнал і керуючий момент також досягають максимальних значень на початковій ділянці, що відповідає необхідності компенсації початкового відхилення; надалі вони швидко зменшуються. Порівняння сигналів φ(t), y_φ(t), φ̂(t) та p(t), y_p(t), p̂(t) </text:span><text:soft-page-break/><text:span text:style-name="T5">показує, що оцінки фільтра Калмана добре відтворюють реальні змінні стану і є менш зашумленими, ніж виміряні сигнали [8, 9].</text:span></text:p>
      <text:p text:style-name="P20"><text:span text:style-name="T5">Режим 2 — початкова кутова швидкість за нульового початкового відхилення кута. Перехідні процеси показано на рисунку 5.2. Регулятор ефективно пригнічує початковий рух і не допускає значного відхилення кута крену.</text:span></text:p>
      <text:p text:style-name="P28"><draw:frame draw:style-name="fr1" text:anchor-type="as-char" svg:width="15cm" svg:height="9.807cm" draw:z-index="11"><draw:image xlink:href="Pictures/10000000000007EF000005309D55F38F.png" xlink:type="simple" xlink:show="embed" xlink:actuate="onLoad"/></draw:frame></text:p>
      <text:p text:style-name="P15"><text:span text:style-name="T2">Рисунок 5.2 — Перехідні процеси замкненої системи у режимі початкової кутової швидкості</text:span></text:p>
      <text:p text:style-name="P20"><text:span text:style-name="T5">Кутова швидкість швидко зменшується до нуля, а кут крену залишається малим упродовж усього процесу. Керуючий сигнал і керуючий момент мають короткочасний характер. Оцінені координати стану добре збігаються з реальними, що підтверджує коректну роботу фільтра Калмана.</text:span></text:p>
      <text:p text:style-name="P20"><text:span text:style-name="T5">Режим 3 — дія ступінчастого збурюючого моменту. Результати моделювання наведено на рисунку 5.3. Після прикладання збурення в системі виникає відхилення кута крену, однак воно залишається незначним і компенсується регулятором.</text:span></text:p>
      <text:p text:style-name="P28"><text:soft-page-break/><draw:frame draw:style-name="fr1" text:anchor-type="as-char" svg:width="15cm" svg:height="9.807cm" draw:z-index="13"><draw:image xlink:href="Pictures/10000000000007EF00000530A4C519A1.png" xlink:type="simple" xlink:show="embed" xlink:actuate="onLoad"/></draw:frame></text:p>
      <text:p text:style-name="P15"><text:span text:style-name="T2">Рисунок 5.3 — Перехідні процеси замкненої системи у режимі ступінчастого збурення</text:span></text:p>
      <text:p text:style-name="P20"><text:span text:style-name="T5">Кутова швидкість і кут крену не виходять за допустимі межі, а керуючий сигнал формує необхідну компенсаційну дію. На графіку керуючого моменту видно перехід до нового рівня, що врівноважує дію зовнішнього збурення. Порівняння істинних, виміряних та оцінених змінних показує, що фільтр Калмана зберігає працездатність і в умовах зовнішнього збурення.</text:span></text:p>
      <text:p text:style-name="P20"><text:span text:style-name="T5">Режим 4 — експоненціально згасне збурення типу пориву вітру. Результати моделювання подано на рисунку 5.4. Найбільший вплив зовнішнього моменту спостерігається на початку процесу, після чого його дія поступово зменшується.</text:span></text:p>
      <text:p text:style-name="P28"><text:soft-page-break/><draw:frame draw:style-name="fr1" text:anchor-type="as-char" svg:width="15cm" svg:height="9.807cm" draw:z-index="15"><draw:image xlink:href="Pictures/10000000000007EF000005301EF640F9.png" xlink:type="simple" xlink:show="embed" xlink:actuate="onLoad"/></draw:frame></text:p>
      <text:p text:style-name="P15"><text:span text:style-name="T2">Рисунок 5.4 — Перехідні процеси замкненої системи у режимі експоненціально згасного збурення</text:span></text:p>
      <text:p text:style-name="P20"><text:span text:style-name="T5">Відповідно найбільші відхилення кута крену, кутової швидкості та керуючих сигналів мають місце на початковій ділянці. Надалі амплітуда коливань зменшується, а система повертається до режиму стабілізації поблизу нульового положення. Оцінки стану, сформовані фільтром Калмана, добре узгоджуються з реальними змінними, що підтверджує ефективність алгоритму оцінювання в умовах нестаціонарного збурення.</text:span></text:p>
      <text:p text:style-name="P20"><text:span text:style-name="T5">Режим 5 — гармонічне збурення. Результати наведено на рисунку 5.5. У цьому випадку зовнішній вплив має періодичний характер, тому після завершення початкової ділянки система переходить у режим вимушених коливань.</text:span></text:p>
      <text:p text:style-name="P28"><text:soft-page-break/><draw:frame draw:style-name="fr1" text:anchor-type="as-char" svg:width="15cm" svg:height="9.807cm" draw:z-index="17"><draw:image xlink:href="Pictures/10000000000007EF0000053004AA250D.png" xlink:type="simple" xlink:show="embed" xlink:actuate="onLoad"/></draw:frame></text:p>
      <text:p text:style-name="P15"><text:span text:style-name="T2">Рисунок 5.5 — Перехідні процеси замкненої системи у режимі гармонічного збурення</text:span></text:p>
      <text:p text:style-name="P20"><text:span text:style-name="T5">Кут крену та кутова швидкість змінюються поблизу нульового значення з малою амплітудою, що свідчить про здатність системи послаблювати вплив гармонічного збурення. Керуючий сигнал і керуючий момент також мають періодичний характер і узгоджені з дією збурення. Порівняння істинних, виміряних та оцінених змінних підтверджує, що фільтр Калмана забезпечує прийнятну якість оцінювання і в цьому режимі.</text:span></text:p>
      <text:p text:style-name="P20"><text:span text:style-name="T5">Зведені числові показники якості стабілізації наведено в таблиці нижче. У таблиці для кожного режиму вказано час стабілізації t_р, максимальне відхилення кута крену φ_max, максимальне значення керуючого сигналу u_sat,max і максимальне значення керуючого моменту M_u,max.</text:span></text:p>
      <text:p text:style-name="P20"><text:span text:style-name="T5"/></text:p>
      <text:p text:style-name="P24"><text:span text:style-name="T5">Таблиця 5.1 — Зведені показники якості</text:span></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7"><text:span text:style-name="T1">Режим</text:span></text:p>
          </table:table-cell>
          <table:table-cell table:style-name="Table1.A1" office:value-type="string">
            <text:p text:style-name="P7"><text:span text:style-name="T1">t_р, с</text:span></text:p>
          </table:table-cell>
          <table:table-cell table:style-name="Table1.A1" office:value-type="string">
            <text:p text:style-name="P7"><text:span text:style-name="T1">φ_max, град</text:span></text:p>
          </table:table-cell>
          <table:table-cell table:style-name="Table1.A1" office:value-type="string">
            <text:p text:style-name="P7"><text:span text:style-name="T1">u_sat,max</text:span></text:p>
          </table:table-cell>
          <table:table-cell table:style-name="Table1.A1" office:value-type="string">
            <text:p text:style-name="P7"><text:span text:style-name="T1">M_u,max, Н·м</text:span></text:p>
          </table:table-cell>
        </table:table-row>
        <table:table-row table:style-name="Table1.2">
          <table:table-cell table:style-name="Table1.A2" office:value-type="string">
            <text:p text:style-name="P4"><text:span text:style-name="T11">Початкове відхилення φ</text:span></text:p>
          </table:table-cell>
          <table:table-cell table:style-name="Table1.A2" office:value-type="string">
            <text:p text:style-name="P3"><text:span text:style-name="T11">1,94</text:span></text:p>
          </table:table-cell>
          <table:table-cell table:style-name="Table1.A2" office:value-type="string">
            <text:p text:style-name="P3"><text:span text:style-name="T11">10,00</text:span></text:p>
          </table:table-cell>
          <table:table-cell table:style-name="Table1.A2" office:value-type="string">
            <text:p text:style-name="P3"><text:span text:style-name="T11">1,172</text:span></text:p>
          </table:table-cell>
          <table:table-cell table:style-name="Table1.A2" office:value-type="string">
            <text:p text:style-name="P3"><text:span text:style-name="T11">0,478</text:span></text:p>
          </table:table-cell>
        </table:table-row>
        <table:table-row table:style-name="Table1.2">
          <table:table-cell table:style-name="Table1.A2" office:value-type="string">
            <text:p text:style-name="P4"><text:span text:style-name="T11">Початкова </text:span><text:soft-page-break/><text:span text:style-name="T11">кутова швидкість</text:span></text:p>
          </table:table-cell>
          <table:table-cell table:style-name="Table1.A2" office:value-type="string">
            <text:p text:style-name="P3"><text:span text:style-name="T11">0,08</text:span></text:p>
          </table:table-cell>
          <table:table-cell table:style-name="Table1.A2" office:value-type="string">
            <text:p text:style-name="P3"><text:span text:style-name="T11">0,62</text:span></text:p>
          </table:table-cell>
          <table:table-cell table:style-name="Table1.A2" office:value-type="string">
            <text:p text:style-name="P3"><text:span text:style-name="T11">0,688</text:span></text:p>
          </table:table-cell>
          <table:table-cell table:style-name="Table1.A2" office:value-type="string">
            <text:p text:style-name="P3"><text:span text:style-name="T11">0,278</text:span></text:p>
          </table:table-cell>
        </table:table-row>
        <table:table-row table:style-name="Table1.2">
          <table:table-cell table:style-name="Table1.A2" office:value-type="string">
            <text:p text:style-name="P4"><text:span text:style-name="T11">Ступінчаст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288</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row table:style-name="Table1.2">
          <table:table-cell table:style-name="Table1.A2" office:value-type="string">
            <text:p text:style-name="P4"><text:span text:style-name="T11">Експоненціальн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207</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row table:style-name="Table1.2">
          <table:table-cell table:style-name="Table1.A2" office:value-type="string">
            <text:p text:style-name="P4"><text:span text:style-name="T11">Гармонічне збурення</text:span></text:p>
          </table:table-cell>
          <table:table-cell table:style-name="Table1.A2" office:value-type="string">
            <text:p text:style-name="P3"><text:span text:style-name="T11">—</text:span></text:p>
          </table:table-cell>
          <table:table-cell table:style-name="Table1.A2" office:value-type="string">
            <text:p text:style-name="P3"><text:span text:style-name="T11">0,426</text:span></text:p>
          </table:table-cell>
          <table:table-cell table:style-name="Table1.A2" office:value-type="string">
            <text:p text:style-name="P3"><text:span text:style-name="T11">—</text:span></text:p>
          </table:table-cell>
          <table:table-cell table:style-name="Table1.A2" office:value-type="string">
            <text:p text:style-name="P3"><text:span text:style-name="T11">—</text:span></text:p>
          </table:table-cell>
        </table:table-row>
      </table:table>
      <text:p text:style-name="P15"><text:span text:style-name="T2"/></text:p>
      <text:p text:style-name="P20"><text:span text:style-name="T5">Найбільш напруженим режимом є режим початкового відхилення кута крену. Для нього час перехідного процесу становить 1,94 с, максимальне відхилення кута крену — 10,0 град, максимальний керуючий сигнал — 1,172, а максимальний керуючий момент — 0,478 Н·м. Найшвидше відпрацювання спостерігається в режимі початкової кутової швидкості: час перехідного процесу 0,08 с, максимальне відхилення кута крену 0,62 град, максимальний керуючий сигнал 0,688, максимальний керуючий момент 0,278 Н·м.</text:span></text:p>
      <text:p text:style-name="P20"><text:span text:style-name="T5">У режимах зовнішніх збурень система демонструє прийнятні показники стабілізації. Максимальне відхилення кута крену становить 0,288 град для ступінчастого збурення, 0,207 град для експоненціально згасного збурення та 0,426 град для гармонічного збурення. Усталена похибка в усіх режимах є малою і знаходиться в межах від 0,0002 до 0,0007 рад.</text:span></text:p>
      <text:p text:style-name="P20"><text:span text:style-name="T5">Максимальні похибки оцінювання залишаються незначними: для кута крену — до 0,0218 рад, для кутової швидкості — до 0,0553 рад/с. Це підтверджує ефективність використання фільтра Калмана у контурі зворотного зв’язку [8, 9].</text:span></text:p>
      <text:p text:style-name="P20"><text:span text:style-name="T5">Отже, результати моделювання підтверджують працездатність синтезованої системи автоматичної стабілізації кута крену. Система забезпечує стійкість, достатню швидкодію, малі відхилення кута крену та прийнятну точність оцінювання стану.</text:span></text:p>
      <text:p text:style-name="P20"><text:span text:style-name="T5"/></text:p>
      <text:p text:style-name="P22"><text:span text:style-name="T2">ЗАКЛЮЧЕННЯ</text:span></text:p>
      <text:p text:style-name="P20"><text:soft-page-break/><text:span text:style-name="T5">У курсовій роботі розв’язано задачу стабілізації кута крену БПЛА-квадрокоптера Х-подібної схеми з центральним розміщенням центра мас. Розроблено функціональну схему системи автоматичної стабілізації, побудовано математичну модель об’єкта у просторі станів, синтезовано регулятор та виконано моделювання динаміки замкненої системи в типових режимах роботи.</text:span></text:p>
      <text:p text:style-name="P20"><text:span text:style-name="T5">Основні результати:</text:span></text:p>
      <text:p text:style-name="P20"><text:span text:style-name="T5">1. Проаналізовано стан проблеми стабілізації кута крену квадрокоптера. Визначено основні дестабілізуючі впливи зовнішнього та внутрішнього походження (вітер, турбулентність, локальні аеродинамічні впливи, зміщення центра мас, неідентичність двигунів і гвинтів, інерційність виконавчого каналу, шуми та похибки датчиків). Розглянуто підходи до стабілізації — класичні регулятори, каскадні структури, методи простору станів — і обґрунтовано вибір ПІ-регулятора з демпфувальним зв’язком за кутовою швидкістю спільно з дискретним фільтром Калмана.</text:span></text:p>
      <text:p text:style-name="P20"><text:span text:style-name="T5">2. Сформовано функціональну схему системи автоматичної стабілізації, у якій кожен функціональний блок має один вхід і один вихід (вимога «одна передавальна функція — один вхід — один вихід»). Об’єкт стабілізації, який має два виходи (φ та p), описано двома передавальними функціями — W_о,φ(s) і W_о,p(s); вимірювальний блок поділено на два канали — датчик кута крену W_д,φ(s) і гіроскоп W_д,p(s).</text:span></text:p>
      <text:p text:style-name="P20"><text:span text:style-name="T5">3. Математичні моделі об’єкта стабілізації та виконавчого каналу побудовано безпосередньо у формі диференціальних рівнянь і моделі у просторі станів — без проміжного введення передавальних функцій, які надалі не використовуються. Це узгоджується з природою фільтра Калмана, який працює з моделлю у просторі станів.</text:span></text:p>
      <text:p text:style-name="P20"><text:span text:style-name="T5">4. Розглянуто застосування дискретного фільтра Калмана для оцінювання вектора стану [φ, p, M_u]ᵀ. Записано алгоритм прогнозування і корекції, наведено дискретизацію матриць A_d ≈ I + A·T₀, B_d ≈ B·T₀ за методом Ейлера першого порядку.</text:span></text:p>
      <text:p text:style-name="P20"><text:soft-page-break/><text:span text:style-name="T5">5. Синтезовано закон стабілізації у вигляді ПІ-регулятора з демпфувальним зворотним зв’язком за оціненою кутовою швидкістю та anti-windup-корекцією. Стійкість лінеаризованої замкненої системи перевірено за критерієм Рауса–Гурвіца для характеристичного полінома четвертого порядку.</text:span></text:p>
      <text:p text:style-name="P20"><text:span text:style-name="T5">6. Виконано чисельне моделювання динаміки замкненої системи у п’яти типових режимах: початкове відхилення кута крену, початкова кутова швидкість, ступінчасте, експоненціально згасне і гармонічне збурення. У всіх режимах система забезпечує стійкість, прийнятну швидкодію та малі відхилення кута крену.</text:span></text:p>
      <text:p text:style-name="P20"><text:span text:style-name="T5">Найбільш напруженим є режим початкового відхилення кута крену: час перехідного процесу 1,94 с, максимальне відхилення 10,0 град. У режимах зовнішніх збурень максимальне відхилення кута крену не перевищує 0,5 град. Усталена похибка в усіх режимах знаходиться в межах 0,0002–0,0007 рад.</text:span></text:p>
      <text:p text:style-name="P20"><text:span text:style-name="T5">Максимальні похибки оцінювання стану фільтром Калмана становлять 0,0218 рад для кута крену і 0,0553 рад/с для кутової швидкості, що підтверджує ефективність блока оцінювання у контурі зворотного зв’язку.</text:span></text:p>
      <text:p text:style-name="P20"><text:span text:style-name="T5">Отримані результати підтверджують працездатність синтезованої системи автоматичної стабілізації кута крену і можуть бути використані для подальшого дослідження систем стабілізації малорозмірних БПЛА мультикоптерного типу та для подальшого комп’ютерного моделювання.</text:span></text:p>
      <text:p text:style-name="P20"><text:span text:style-name="T5"/></text:p>
      <text:p text:style-name="P21"><text:span text:style-name="T8">СПИСОК ВИКОРИСТАНИХ ДЖЕРЕЛ</text:span></text:p>
      <text:p text:style-name="P30"><text:span text:style-name="T2">1. Bouabdallah S. Design and Control of Quadrotors with Application to Autonomous Flying : PhD Dissertation. Lausanne : École Polytechnique Fédérale de Lausanne, 2007.</text:span></text:p>
      <text:p text:style-name="P30"><text:span text:style-name="T2">2. Bouabdallah S., Siegwart R. Full control of a quadrotor // Proceedings of the 2007 IEEE/RSJ International Conference on Intelligent Robots and Systems. IEEE, 2007. P. 153–158. DOI: 10.1109/IROS.2007.4399042.</text:span></text:p>
      <text:p text:style-name="P30"><text:soft-page-break/><text:span text:style-name="T2">3. Beard R. W. Quadrotor Dynamics and Control. Rev 0.1. Brigham Young University, 2008.</text:span></text:p>
      <text:p text:style-name="P30"><text:span text:style-name="T2">4. Mahony R., Kumar V., Corke P. Multirotor aerial vehicles: Modeling, estimation, and control of quadrotor // IEEE Robotics &amp; Automation Magazine. 2012. Vol. 19, No. 3. P. 20–32. DOI: 10.1109/MRA.2012.2206474.</text:span></text:p>
      <text:p text:style-name="P30"><text:span text:style-name="T2">5. Mahony R., Kumar V. Aerial robotics and the quadrotor // IEEE Robotics &amp; Automation Magazine. 2012. Vol. 19, No. 3. P. 19. DOI: 10.1109/MRA.2012.2208151.</text:span></text:p>
      <text:p text:style-name="P30"><text:span text:style-name="T2">6. Quan Q. Introduction to Multicopter Design and Control. Singapore : Springer, 2017. DOI: 10.1007/978-981-10-3382-7.</text:span></text:p>
      <text:p text:style-name="P30"><text:span text:style-name="T2">7. Zhang X., Li X., Wang K., Lu Y. A survey of modelling and identification of quadrotor robot // Abstract and Applied Analysis. 2014. Vol. 2014. Article ID 320526. DOI: 10.1155/2014/320526.</text:span></text:p>
      <text:p text:style-name="P30"><text:span text:style-name="T2">8. Kalman R. E. A new approach to linear filtering and prediction problems // Journal of Basic Engineering. 1960. Vol. 82, No. 1. P. 35–45. DOI: 10.1115/1.3662552.</text:span></text:p>
      <text:p text:style-name="P30"><text:span text:style-name="T2">9. Simon D. Optimal State Estimation: Kalman, H Infinity, and Nonlinear Approaches. Hoboken : John Wiley &amp; Sons, 2006. DOI: 10.1002/0470045345.</text:span></text:p>
      <text:p text:style-name="P30"><text:span text:style-name="T2">10. Ogata K. Modern Control Engineering. 5th ed. Boston : Pearson, 2010.</text:span></text:p>
      <text:p text:style-name="P30"><text:span text:style-name="T2">11. Nise N. S. Control Systems Engineering. 8th ed. Hoboken : John Wiley &amp; Sons, 2019.</text:span></text:p>
      <text:p text:style-name="P30"><text:span text:style-name="T2">12. Stengel R. F. Optimal Control and Estimation. New York : Dover Publications,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Times New Roman" fo:font-size="14pt" style:font-name-asian="Times New Roman1" style:font-size-asian="14pt"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7</meta:editing-cycles>
    <meta:creation-date>2013-12-23T23:15:00</meta:creation-date>
    <dc:date>2026-05-11T20:14:26.30</dc:date>
    <meta:editing-duration>PT1H35M15S</meta:editing-duration>
    <meta:generator>OpenOffice/4.1.16$Win32 OpenOffice.org_project/4116m3$Build-9816</meta:generator>
    <dc:creator>Yevhen Volovyk</dc:creator>
    <meta:document-statistic meta:table-count="1" meta:image-count="12" meta:object-count="0" meta:page-count="45" meta:paragraph-count="494" meta:word-count="7723" meta:character-count="554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